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9F000006129DFD072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Times New Roman" fo:font-size="22pt" officeooo:rsid="0009f371" officeooo:paragraph-rsid="0009f371" style:font-size-asian="22pt" style:font-size-complex="22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20pt" officeooo:rsid="0009f371" officeooo:paragraph-rsid="0009f371" style:font-size-asian="20pt" style:font-size-complex="20pt"/>
    </style:style>
    <style:style style:name="P3" style:family="paragraph" style:parent-style-name="Standard">
      <style:paragraph-properties fo:line-height="115%" fo:text-align="center" style:justify-single-word="false"/>
      <style:text-properties style:font-name="Times New Roman" fo:font-size="18pt" officeooo:rsid="0009f371" officeooo:paragraph-rsid="0009f371" style:font-size-asian="18pt" style:font-size-complex="18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Times New Roman" fo:font-size="16pt" fo:font-weight="bold" officeooo:rsid="000b76c5" officeooo:paragraph-rsid="000b76c5" style:font-size-asian="16pt" style:font-weight-asian="bold" style:font-size-complex="16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Times New Roman" fo:font-size="18pt" officeooo:rsid="000b76c5" officeooo:paragraph-rsid="000b76c5" style:font-size-asian="18pt" style:font-size-complex="18pt"/>
    </style:style>
    <style:style style:name="P6" style:family="paragraph" style:parent-style-name="Standard">
      <style:paragraph-properties fo:line-height="115%" fo:text-align="center" style:justify-single-word="false"/>
      <style:text-properties style:font-name="Times New Roman" fo:font-size="18pt" fo:font-style="italic" officeooo:rsid="000b76c5" officeooo:paragraph-rsid="000b76c5" style:font-size-asian="18pt" style:font-style-asian="italic" style:font-size-complex="18pt" style:font-style-complex="italic"/>
    </style:style>
    <style:style style:name="P7" style:family="paragraph" style:parent-style-name="Standard" style:list-style-name="L1">
      <style:paragraph-properties fo:line-height="115%" fo:text-align="center" style:justify-single-word="false"/>
      <style:text-properties style:font-name="Times New Roman" fo:font-size="18pt" fo:font-style="normal" officeooo:rsid="000b76c5" officeooo:paragraph-rsid="000b76c5" style:font-size-asian="18pt" style:font-style-asian="normal" style:font-size-complex="18pt" style:font-style-complex="normal"/>
    </style:style>
    <style:style style:name="P8" style:family="paragraph" style:parent-style-name="Standard">
      <style:paragraph-properties fo:line-height="115%" fo:text-align="center" style:justify-single-word="false"/>
      <style:text-properties style:font-name="Times New Roman" fo:font-size="18pt" fo:font-style="italic" officeooo:rsid="000cb628" officeooo:paragraph-rsid="000cb628" style:font-size-asian="18pt" style:font-style-asian="italic" style:font-size-complex="18pt" style:font-style-complex="italic"/>
    </style:style>
    <style:style style:name="P9" style:family="paragraph" style:parent-style-name="Standard">
      <style:paragraph-properties fo:line-height="115%" fo:text-align="center" style:justify-single-word="false"/>
      <style:text-properties style:font-name="Times New Roman" fo:font-size="18pt" fo:font-style="normal" officeooo:rsid="000cb628" officeooo:paragraph-rsid="000cb628" style:font-size-asian="18pt" style:font-style-asian="normal" style:font-size-complex="18pt" style:font-style-complex="normal"/>
    </style:style>
    <style:style style:name="T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1.6701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 NACIONAL DE SAN CRISTÓBAL DE HUAMANGA</text:p>
      <text:p text:style-name="P2">FACULTAD DE CIENCIAS ECONÓMICAS, ADMINISTRATIVAS Y CONTABLES</text:p>
      <text:p text:style-name="P3">ESCUELA PROFESIONAL DE ECONOMÍA</text:p>
      <text:p text:style-name="P3"><draw:frame draw:style-name="fr1" draw:name="Image1" text:anchor-type="char" svg:x="1.9937in" svg:y="0.1102in" svg:width="2.7055in" svg:height="2.4083in" draw:z-index="0"><draw:image xlink:href="Pictures/100000010000049F000006129DFD0722.png" xlink:type="simple" xlink:show="embed" xlink:actuate="onLoad" draw:mime-type="image/png"/></draw:frame></text:p>
      <text:p text:style-name="P4">Desigualdad socioeconómica y al pobreza en el departamento Ayacucho, periodo 2000 – 2025</text:p>
      <text:p text:style-name="P4"/>
      <text:p text:style-name="P4">Trabajo de monografía</text:p>
      <text:p text:style-name="P5"/>
      <text:p text:style-name="P6">Presentado por:</text:p>
      <text:list text:style-name="L1">
        <text:list-item>
          <text:p text:style-name="P7">Diego PEREZ RODRIGUEZ</text:p>
        </text:list-item>
        <text:list-item>
          <text:p text:style-name="P7">Sofía MENDOZA SÁNCHEZ</text:p>
          <text:p text:style-name="P7"/>
        </text:list-item>
      </text:list>
      <text:p text:style-name="P6">Profesor/Docente: Dr. Pelayo HILARIO VALENZUELA</text:p>
      <text:p text:style-name="P8">Curso: <text:span text:style-name="T1">Medología de la investigacion (ME-145)</text:span></text:p>
      <text:p text:style-name="P6"/>
      <text:p text:style-name="P9">Ayacucho – Perú</text:p>
      <text:p text:style-name="P9">Enero, 2026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Edison Achalma</meta:initial-creator>
    <meta:creation-date>2026-01-14T19:21:35.899339161</meta:creation-date>
    <dc:date>2026-01-14T21:50:27.059812184</dc:date>
    <dc:creator>Edison Achalma</dc:creator>
    <meta:editing-duration>PT1H50M8S</meta:editing-duration>
    <meta:editing-cycles>3</meta:editing-cycles>
    <meta:generator>LibreOffice/25.8.4.2$Linux_X86_64 LibreOffice_project/580$Build-2</meta:generator>
    <meta:document-statistic meta:table-count="0" meta:image-count="1" meta:object-count="0" meta:page-count="1" meta:paragraph-count="12" meta:word-count="58" meta:character-count="428" meta:non-whitespace-character-count="382"/>
  </office:meta>
</office:document-meta>
</file>