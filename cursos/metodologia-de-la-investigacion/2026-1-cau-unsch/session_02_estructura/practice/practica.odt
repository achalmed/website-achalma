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23000000ADAAEC27DD.png" manifest:media-type="image/png"/>
  <manifest:file-entry manifest:full-path="Pictures/10000000000002D400000085D030964C.png" manifest:media-type="image/png"/>
  <manifest:file-entry manifest:full-path="Pictures/100000000000034100000118FEC90F53.png" manifest:media-type="image/png"/>
  <manifest:file-entry manifest:full-path="Pictures/1000000000000341000001096235BB69.png" manifest:media-type="image/png"/>
  <manifest:file-entry manifest:full-path="Pictures/10000000000001AA00000106DF3B950E.png" manifest:media-type="image/png"/>
  <manifest:file-entry manifest:full-path="Pictures/10000000000001B8000001E079FE233B.png" manifest:media-type="image/png"/>
  <manifest:file-entry manifest:full-path="Pictures/1000000100000495000004131E8AE1C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ystem" style:font-pitch="variable"/>
    <style:font-face style:name="Calibri" svg:font-family="Calibri" style:font-family-generic="roman"/>
    <style:font-face style:name="Calibri Light" svg:font-family="'Calibri Light'" style:font-family-generic="roman"/>
    <style:font-face style:name="Calibri1" svg:font-family="Calibri" style:font-family-generic="system" style:font-pitch="variable"/>
    <style:font-face style:name="Courier New" svg:font-family="'Courier New'"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6.0868in" table:align="margins" style:may-break-between-rows="true" style:writing-mode="lr-tb" table:border-model="collapsing"/>
    </style:style>
    <style:style style:name="Table1.A" style:family="table-column">
      <style:table-column-properties style:column-width="2.0292in" style:rel-column-width="21845*"/>
    </style:style>
    <style:style style:name="Table1.1" style:family="table-row">
      <style:table-row-properties fo:keep-together="auto"/>
    </style:style>
    <style:style style:name="Table1.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middle" fo:background-color="transparent" fo:padding="0in" fo:border="none" style:writing-mode="page">
        <style:background-image/>
      </style:table-cell-properties>
    </style:style>
    <style:style style:name="Table1.C2" style:family="table-cell" style:data-style-name="N10000">
      <style:table-cell-properties style:vertical-align="middle" fo:background-color="transparent" fo:padding="0in" fo:border="none" style:writing-mode="page">
        <style:background-image/>
      </style:table-cell-properties>
    </style:style>
    <style:style style:name="Table1.A12"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1.B12"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1.C12" style:family="table-cell" style:data-style-name="N10000">
      <style:table-cell-properties style:vertical-align="middle" fo:background-color="transparent" fo:padding="0in" fo:border-left="none" fo:border-right="none" fo:border-top="none" fo:border-bottom="0.75pt solid #000000" style:writing-mode="page">
        <style:background-image/>
      </style:table-cell-properties>
    </style:style>
    <style:style style:name="Tabla1" style:family="table">
      <style:table-properties style:width="5.1667in" fo:margin-left="0.4924in" fo:margin-top="0in" fo:margin-bottom="0in" table:align="left" style:writing-mode="lr-tb"/>
    </style:style>
    <style:style style:name="Tabla1.A" style:family="table-column">
      <style:table-column-properties style:column-width="0.8611in"/>
    </style:style>
    <style:style style:name="Tabla1.B" style:family="table-column">
      <style:table-column-properties style:column-width="0.8604in"/>
    </style:style>
    <style:style style:name="Tabla1.C" style:family="table-column">
      <style:table-column-properties style:column-width="0.8618in"/>
    </style:style>
    <style:style style:name="Tabla1.1" style:family="table-row">
      <style:table-row-properties style:min-row-height="0.2in" fo:keep-together="auto"/>
    </style:style>
    <style:style style:name="Tabla1.A1"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a1.A2" style:family="table-cell">
      <style:table-cell-properties style:vertical-align="middle" fo:padding-left="0.075in" fo:padding-right="0.075in" fo:padding-top="0in" fo:padding-bottom="0in" fo:border="none" style:writing-mode="lr-tb"/>
    </style:style>
    <style:style style:name="Tabla1.A6"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a2" style:family="table">
      <style:table-properties style:width="3.4444in" fo:margin-left="0.4924in" fo:margin-top="0in" fo:margin-bottom="0in" table:align="left" style:writing-mode="lr-tb"/>
    </style:style>
    <style:style style:name="Tabla2.A" style:family="table-column">
      <style:table-column-properties style:column-width="0.8611in"/>
    </style:style>
    <style:style style:name="Tabla2.1" style:family="table-row">
      <style:table-row-properties style:min-row-height="0.2in" fo:keep-together="auto"/>
    </style:style>
    <style:style style:name="Tabla2.A1"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a2.A2" style:family="table-cell">
      <style:table-cell-properties style:vertical-align="middle" fo:padding-left="0.075in" fo:padding-right="0.075in" fo:padding-top="0in" fo:padding-bottom="0in" fo:border="none" style:writing-mode="lr-tb"/>
    </style:style>
    <style:style style:name="Tabla2.A7"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a3" style:family="table">
      <style:table-properties style:width="5.1667in" fo:margin-left="0.4924in" fo:margin-top="0in" fo:margin-bottom="0in" table:align="left" style:writing-mode="lr-tb"/>
    </style:style>
    <style:style style:name="Tabla3.A" style:family="table-column">
      <style:table-column-properties style:column-width="0.8611in"/>
    </style:style>
    <style:style style:name="Tabla3.B" style:family="table-column">
      <style:table-column-properties style:column-width="0.8604in"/>
    </style:style>
    <style:style style:name="Tabla3.C" style:family="table-column">
      <style:table-column-properties style:column-width="0.8618in"/>
    </style:style>
    <style:style style:name="Tabla3.1" style:family="table-row">
      <style:table-row-properties style:min-row-height="0.2in" fo:keep-together="auto"/>
    </style:style>
    <style:style style:name="Tabla3.A1"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a3.A2" style:family="table-cell">
      <style:table-cell-properties style:vertical-align="middle" fo:padding-left="0.075in" fo:padding-right="0.075in" fo:padding-top="0in" fo:padding-bottom="0in" fo:border="none" style:writing-mode="lr-tb"/>
    </style:style>
    <style:style style:name="Tabla3.A6"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P1" style:family="paragraph" style:parent-style-name="APA_20_Párrafo" style:master-page-name="MasterPage2">
      <style:paragraph-properties fo:line-height="100%" fo:text-align="center" style:justify-single-word="false" style:page-number="auto"/>
      <style:text-properties fo:font-size="22pt" officeooo:paragraph-rsid="001aff70"/>
    </style:style>
    <style:style style:name="P2" style:family="paragraph">
      <loext:graphic-properties draw:fill="none"/>
    </style:style>
    <style:style style:name="P3" style:family="paragraph" style:parent-style-name="APA_20_Párrafo">
      <style:paragraph-properties fo:line-height="100%" fo:text-align="center" style:justify-single-word="false" fo:text-indent="0in" style:auto-text-indent="false"/>
      <style:text-properties fo:font-size="12pt" officeooo:paragraph-rsid="001aff70" style:font-size-asian="10.5pt" style:font-size-complex="12pt"/>
    </style:style>
    <style:style style:name="P4" style:family="paragraph" style:parent-style-name="APA_20_Párrafo">
      <style:paragraph-properties fo:line-height="100%" fo:text-align="center" style:justify-single-word="false" fo:text-indent="0in" style:auto-text-indent="false"/>
      <style:text-properties officeooo:paragraph-rsid="001aff70"/>
    </style:style>
    <style:style style:name="P5" style:family="paragraph" style:parent-style-name="APA_20_Párrafo">
      <style:paragraph-properties fo:line-height="150%" fo:text-align="center" style:justify-single-word="false"/>
      <style:text-properties fo:font-size="18pt" officeooo:paragraph-rsid="001aff70" style:font-size-asian="18pt" style:font-size-complex="18pt"/>
    </style:style>
    <style:style style:name="P6" style:family="paragraph" style:parent-style-name="APA_20_Párrafo">
      <style:paragraph-properties fo:line-height="150%" fo:text-align="center" style:justify-single-word="false" fo:text-indent="0in" style:auto-text-indent="false"/>
      <style:text-properties officeooo:paragraph-rsid="001aff70"/>
    </style:style>
    <style:style style:name="P7" style:family="paragraph" style:parent-style-name="APA_20_Párrafo">
      <style:paragraph-properties fo:line-height="150%" fo:text-align="center" style:justify-single-word="false" fo:text-indent="0in" style:auto-text-indent="false"/>
      <style:text-properties fo:font-size="16pt" fo:font-weight="bold" officeooo:paragraph-rsid="001aff70" style:font-size-asian="16pt" style:font-weight-asian="bold" style:font-size-complex="16pt" style:font-weight-complex="bold"/>
    </style:style>
    <style:style style:name="P8" style:family="paragraph" style:parent-style-name="APA_20_Párrafo">
      <style:paragraph-properties fo:line-height="150%" fo:text-align="center" style:justify-single-word="false" fo:text-indent="0in" style:auto-text-indent="false"/>
      <style:text-properties fo:font-weight="bold" officeooo:paragraph-rsid="001aff70" style:font-weight-asian="bold" style:font-weight-complex="bold"/>
    </style:style>
    <style:style style:name="P9" style:family="paragraph" style:parent-style-name="APA_20_Párrafo">
      <style:paragraph-properties fo:line-height="150%" fo:text-align="center" style:justify-single-word="false"/>
      <style:text-properties officeooo:paragraph-rsid="001aff70"/>
    </style:style>
    <style:style style:name="P10" style:family="paragraph" style:parent-style-name="APA_20_Párrafo">
      <style:paragraph-properties fo:line-height="150%" fo:text-align="center" style:justify-single-word="false" fo:text-indent="0in" style:auto-text-indent="false"/>
      <style:text-properties fo:font-style="italic" officeooo:paragraph-rsid="001aff70" style:font-style-asian="italic" style:font-style-complex="italic"/>
    </style:style>
    <style:style style:name="P11" style:family="paragraph" style:parent-style-name="APA_20_Párrafo" style:list-style-name="WWNum25">
      <style:paragraph-properties fo:line-height="150%" fo:text-align="start" style:justify-single-word="false"/>
      <style:text-properties officeooo:paragraph-rsid="001aff70"/>
    </style:style>
    <style:style style:name="P12" style:family="paragraph">
      <loext:graphic-properties draw:fill="none"/>
      <style:text-properties fo:font-size="10pt"/>
    </style:style>
    <style:style style:name="P13" style:family="paragraph" style:parent-style-name="Standard" style:master-page-name="Converted1">
      <style:paragraph-properties fo:text-align="center" style:justify-single-word="false" style:page-number="2" fo:break-before="page"/>
    </style:style>
    <style:style style:name="P14" style:family="paragraph" style:parent-style-name="Standard">
      <style:paragraph-properties fo:margin-top="0in" fo:margin-bottom="0.111in" style:contextual-spacing="false" fo:line-height="108%"/>
      <style:text-properties fo:background-color="#ffffff" style:font-name-asian="Calibri1" style:font-name-complex="Arial"/>
    </style:style>
    <style:style style:name="P15" style:family="paragraph" style:parent-style-name="Standard">
      <style:paragraph-properties fo:margin-top="0in" fo:margin-bottom="0in" style:contextual-spacing="false" fo:text-align="center" style:justify-single-word="false" fo:break-before="page"/>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0.3335in"/>
          <style:tab-stop style:position="6.0862in" style:type="right" style:leader-style="dotted" style:leader-text="."/>
        </style:tab-stops>
      </style:paragraph-properties>
    </style:style>
    <style:style style:name="P18" style:family="paragraph" style:parent-style-name="Contents_20_2">
      <style:paragraph-properties>
        <style:tab-stops>
          <style:tab-stop style:position="0.611in"/>
          <style:tab-stop style:position="6.0862in" style:type="right" style:leader-style="dotted" style:leader-text="."/>
        </style:tab-stops>
      </style:paragraph-properties>
    </style:style>
    <style:style style:name="P19" style:family="paragraph" style:parent-style-name="Contents_20_3">
      <style:paragraph-properties>
        <style:tab-stops>
          <style:tab-stop style:position="0.9165in"/>
          <style:tab-stop style:position="6.0862in" style:type="right" style:leader-style="dotted" style:leader-text="."/>
        </style:tab-stops>
      </style:paragraph-properties>
    </style:style>
    <style:style style:name="P20" style:family="paragraph" style:parent-style-name="Standard">
      <style:paragraph-properties fo:text-align="justify" style:justify-single-word="false"/>
      <style:text-properties fo:background-color="#ffffff" style:font-name-asian="Calibri1" style:font-name-complex="Arial"/>
    </style:style>
    <style:style style:name="P21" style:family="paragraph" style:parent-style-name="Figure_20_Index_20_1">
      <style:paragraph-properties>
        <style:tab-stops>
          <style:tab-stop style:position="5.9945in" style:type="right" style:leader-style="dotted" style:leader-text="."/>
        </style:tab-stops>
      </style:paragraph-properties>
    </style:style>
    <style:style style:name="P22" style:family="paragraph" style:parent-style-name="Standard">
      <style:text-properties style:font-size-complex="16pt"/>
    </style:style>
    <style:style style:name="P23" style:family="paragraph" style:parent-style-name="Heading_20_1" style:master-page-name="Converted2">
      <style:paragraph-properties style:page-number="7"/>
      <style:text-properties officeooo:rsid="00239180" officeooo:paragraph-rsid="00239180"/>
    </style:style>
    <style:style style:name="P24" style:family="paragraph" style:parent-style-name="Standard">
      <style:text-properties officeooo:paragraph-rsid="00239180"/>
    </style:style>
    <style:style style:name="P25" style:family="paragraph">
      <loext:graphic-properties draw:fill-color="#e91e63"/>
      <style:paragraph-properties fo:text-align="center"/>
    </style:style>
    <style:style style:name="P26" style:family="paragraph">
      <loext:graphic-properties draw:fill="none" draw:fill-color="#ffffff"/>
      <style:text-properties fo:color="#e91e63" loext:opacity="100%" style:font-name="Times New Roman1" fo:font-size="18pt" fo:font-weight="bold" style:font-size-asian="18pt" style:font-weight-asian="bold" style:font-size-complex="18pt" style:font-weight-complex="bold"/>
    </style:style>
    <style:style style:name="P27" style:family="paragraph" style:parent-style-name="Heading_20_1">
      <style:text-properties officeooo:paragraph-rsid="00311115"/>
    </style:style>
    <style:style style:name="P28" style:family="paragraph" style:parent-style-name="APA_20_Párrafo">
      <style:paragraph-properties fo:text-align="justify" style:justify-single-word="false"/>
    </style:style>
    <style:style style:name="P29" style:family="paragraph">
      <style:paragraph-properties fo:text-align="center"/>
    </style:style>
    <style:style style:name="P30" style:family="paragraph" style:parent-style-name="APA_20_Párrafo">
      <style:paragraph-properties fo:line-height="100%" fo:text-align="center" style:justify-single-word="false"/>
      <style:text-properties officeooo:paragraph-rsid="0078f883"/>
    </style:style>
    <style:style style:name="P31" style:family="paragraph" style:parent-style-name="APA_20_Párrafo">
      <style:paragraph-properties fo:text-align="justify" style:justify-single-word="false"/>
      <style:text-properties officeooo:paragraph-rsid="007e8bfd"/>
    </style:style>
    <style:style style:name="P32" style:family="paragraph" style:parent-style-name="APA_20_Párrafo" style:list-style-name="L1">
      <style:paragraph-properties fo:text-align="justify" style:justify-single-word="false"/>
    </style:style>
    <style:style style:name="P33" style:family="paragraph" style:parent-style-name="APA_20_Párrafo" style:list-style-name="L2">
      <style:paragraph-properties fo:text-align="justify" style:justify-single-word="false"/>
    </style:style>
    <style:style style:name="P34" style:family="paragraph" style:parent-style-name="Heading_20_1" style:master-page-name="">
      <style:paragraph-properties style:page-number="auto" fo:break-before="auto" fo:break-after="auto"/>
      <style:text-properties officeooo:paragraph-rsid="0045cb27"/>
    </style:style>
    <style:style style:name="P35" style:family="paragraph">
      <loext:graphic-properties draw:fill="none" draw:fill-color="#ffffff"/>
      <style:text-properties fo:color="#e91e63" loext:opacity="100%" style:font-name="Times New Roman1" fo:font-size="12pt" style:font-size-asian="12pt" style:font-size-complex="12pt"/>
    </style:style>
    <style:style style:name="P36" style:family="paragraph" style:parent-style-name="APA_20_Párrafo" style:list-style-name="L3">
      <style:paragraph-properties fo:text-align="justify" style:justify-single-word="false"/>
    </style:style>
    <style:style style:name="P37" style:family="paragraph" style:parent-style-name="APA_20_Párrafo" style:list-style-name="L4">
      <style:paragraph-properties fo:text-align="justify" style:justify-single-word="false"/>
    </style:style>
    <style:style style:name="P38" style:family="paragraph" style:parent-style-name="Heading_20_1">
      <style:text-properties officeooo:paragraph-rsid="00941f89"/>
    </style:style>
    <style:style style:name="P39" style:family="paragraph" style:parent-style-name="Standard">
      <style:text-properties officeooo:paragraph-rsid="00941f89"/>
    </style:style>
    <style:style style:name="P40"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bold" style:font-name-asian="Calibri1" style:font-size-asian="10pt" style:font-style-asian="normal" style:font-weight-asian="bold" style:font-name-complex="Arial" style:font-size-complex="10pt" style:font-style-complex="normal" style:font-weight-complex="bold" style:text-overline-style="none" style:text-overline-color="font-color"/>
    </style:style>
    <style:style style:name="P41"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style:font-name-asian="Calibri1" style:font-size-asian="10pt" style:font-style-asian="normal" style:font-weight-asian="normal" style:font-name-complex="Arial" style:font-size-complex="10pt" style:font-style-complex="normal" style:font-weight-complex="normal" style:text-overline-style="none" style:text-overline-color="font-color"/>
    </style:style>
    <style:style style:name="P42"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061f41c" style:font-name-asian="Calibri1" style:font-size-asian="10pt" style:font-style-asian="normal" style:font-weight-asian="normal" style:font-name-complex="Arial" style:font-size-complex="10pt" style:font-style-complex="normal" style:font-weight-complex="normal" style:text-overline-style="none" style:text-overline-color="font-color"/>
    </style:style>
    <style:style style:name="P43" style:family="paragraph" style:parent-style-name="Heading_20_1">
      <style:text-properties officeooo:paragraph-rsid="0064b408"/>
    </style:style>
    <style:style style:name="P44" style:family="paragraph" style:parent-style-name="APA_20_Párrafo">
      <style:paragraph-properties fo:text-align="start" style:justify-single-word="false"/>
    </style:style>
    <style:style style:name="P45" style:family="paragraph">
      <style:paragraph-properties fo:text-align="end"/>
    </style:style>
    <style:style style:name="P46" style:family="paragraph">
      <loext:graphic-properties draw:fill="none"/>
      <style:paragraph-properties fo:text-align="center"/>
    </style:style>
    <style:style style:name="P47" style:family="paragraph">
      <loext:graphic-properties draw:fill="none" draw:fill-color="#ffffff"/>
      <style:paragraph-properties fo:text-align="end"/>
      <style:text-properties fo:color="#e91e63" loext:opacity="100%" style:font-name="Times New Roman1" fo:font-size="12pt" style:font-size-asian="12pt" style:font-size-complex="12pt"/>
    </style:style>
    <style:style style:name="P48" style:family="paragraph" style:parent-style-name="APA_20_Párrafo" style:list-style-name="L5">
      <style:paragraph-properties fo:text-align="justify" style:justify-single-word="false"/>
    </style:style>
    <style:style style:name="P49" style:family="paragraph" style:parent-style-name="Heading_20_1" style:master-page-name="">
      <style:paragraph-properties style:page-number="auto" fo:break-before="auto" fo:break-after="auto"/>
      <style:text-properties officeooo:paragraph-rsid="00349cc8"/>
    </style:style>
    <style:style style:name="P50" style:family="paragraph" style:parent-style-name="APA_20_Párrafo">
      <style:paragraph-properties fo:text-align="center" style:justify-single-word="false"/>
    </style:style>
    <style:style style:name="P51" style:family="paragraph" style:parent-style-name="Heading_20_2">
      <style:paragraph-properties fo:margin-left="0.4925in" fo:text-indent="-0.4925in" style:auto-text-indent="false"/>
      <style:text-properties officeooo:paragraph-rsid="00349cc8"/>
    </style:style>
    <style:style style:name="P52" style:family="paragraph" style:parent-style-name="APA_20_Párrafo">
      <style:text-properties fo:font-weight="bold" officeooo:paragraph-rsid="00349cc8" style:font-weight-asian="bold" style:font-weight-complex="bold"/>
    </style:style>
    <style:style style:name="P53" style:family="paragraph" style:parent-style-name="APA_20_Párrafo">
      <style:text-properties officeooo:paragraph-rsid="00349cc8"/>
    </style:style>
    <style:style style:name="P54" style:family="paragraph" style:parent-style-name="Heading_20_3">
      <style:text-properties officeooo:paragraph-rsid="00349cc8"/>
    </style:style>
    <style:style style:name="P55" style:family="paragraph" style:parent-style-name="APA_20_Párrafo">
      <style:text-properties fo:font-style="italic" fo:font-weight="bold" officeooo:paragraph-rsid="00349cc8" style:font-style-asian="italic" style:font-weight-asian="bold" style:font-style-complex="italic" style:font-weight-complex="bold"/>
    </style:style>
    <style:style style:name="P56" style:family="paragraph" style:parent-style-name="Heading_20_4">
      <style:text-properties officeooo:paragraph-rsid="00349cc8"/>
    </style:style>
    <style:style style:name="P57" style:family="paragraph" style:parent-style-name="Heading_20_5">
      <style:text-properties officeooo:paragraph-rsid="00349cc8"/>
    </style:style>
    <style:style style:name="P58" style:family="paragraph" style:parent-style-name="Standard">
      <style:text-properties officeooo:paragraph-rsid="00349cc8"/>
    </style:style>
    <style:style style:name="P59" style:family="paragraph" style:parent-style-name="Standard" style:list-style-name="L6">
      <style:text-properties officeooo:paragraph-rsid="00349cc8"/>
    </style:style>
    <style:style style:name="P60" style:family="paragraph" style:parent-style-name="Heading_20_2">
      <style:paragraph-properties fo:margin-left="0.4925in" fo:text-indent="-0.4925in" style:auto-text-indent="false"/>
    </style:style>
    <style:style style:name="P61" style:family="paragraph" style:parent-style-name="Heading_20_1">
      <style:paragraph-properties fo:margin-top="0in" fo:margin-bottom="0in" style:contextual-spacing="false" fo:break-before="page"/>
    </style:style>
    <style:style style:name="P62" style:family="paragraph" style:parent-style-name="Standard">
      <style:paragraph-properties fo:margin-top="0in" fo:margin-bottom="0in" style:contextual-spacing="false" fo:line-height="100%" fo:text-align="start" style:justify-single-word="false" fo:orphans="2" fo:widows="2"/>
      <style:text-properties style:use-window-font-color="true" loext:opacity="0%" fo:language="es" fo:country="ES" style:letter-kerning="false" style:font-name-asian="Calibri1" style:language-asian="en" style:country-asian="US" style:font-size-complex="11pt" style:language-complex="ar" style:country-complex="SA"/>
    </style:style>
    <style:style style:name="P63" style:family="paragraph" style:parent-style-name="Standard">
      <style:paragraph-properties fo:margin-top="0in" fo:margin-bottom="0in" style:contextual-spacing="false" fo:line-height="100%" fo:text-align="center" style:justify-single-word="false" fo:orphans="2" fo:widows="2"/>
      <style:text-properties fo:language="es" fo:country="ES" style:letter-kerning="false" style:font-name-asian="Calibri1" style:language-asian="en" style:country-asian="US" style:font-size-complex="11pt" style:language-complex="ar" style:country-complex="SA"/>
    </style:style>
    <style:style style:name="P64" style:family="paragraph" style:parent-style-name="Standard">
      <style:paragraph-properties fo:text-align="center" style:justify-single-word="false"/>
    </style:style>
    <style:style style:name="P65" style:family="paragraph" style:parent-style-name="Standard">
      <style:paragraph-properties fo:margin-top="0in" fo:margin-bottom="0.111in" style:contextual-spacing="false" fo:line-height="108%"/>
    </style:style>
    <style:style style:name="P66" style:family="paragraph" style:parent-style-name="List_20_Paragraph" style:list-style-name="WWNum6"/>
    <style:style style:name="P67" style:family="paragraph" style:parent-style-name="List_20_Paragraph" style:list-style-name="WWNum5"/>
    <style:style style:name="P68" style:family="paragraph" style:parent-style-name="Standard">
      <style:paragraph-properties fo:margin-left="0.5in"/>
    </style:style>
    <style:style style:name="P69" style:family="paragraph" style:parent-style-name="List_20_Paragraph" style:list-style-name="WWNum5">
      <style:text-properties fo:font-weight="bold" style:font-weight-asian="bold"/>
    </style:style>
    <style:style style:name="T1" style:family="text">
      <style:text-properties fo:color="#f44336" loext:opacity="100%" fo:font-size="11pt"/>
    </style:style>
    <style:style style:name="T2" style:family="text">
      <style:text-properties style:font-size-asian="22pt" style:font-size-complex="22pt"/>
    </style:style>
    <style:style style:name="T3" style:family="text">
      <style:text-properties fo:font-size="20pt" style:font-size-asian="17.5pt" style:font-size-complex="20pt"/>
    </style:style>
    <style:style style:name="T4" style:family="text">
      <style:text-properties fo:font-size="20pt" style:font-size-asian="20pt" style:font-size-complex="20pt"/>
    </style:style>
    <style:style style:name="T5" style:family="text">
      <style:text-properties fo:color="#f44336" loext:opacity="100%"/>
    </style:style>
    <style:style style:name="T6" style:family="text">
      <style:text-properties fo:font-size="16pt" fo:font-weight="bold" style:font-size-asian="16pt" style:font-weight-asian="bold" style:font-size-complex="16pt" style:font-weight-complex="bold"/>
    </style:style>
    <style:style style:name="T7" style:family="text">
      <style:text-properties officeooo:rsid="00be121a"/>
    </style:style>
    <style:style style:name="T8" style:family="text">
      <style:text-properties officeooo:rsid="00c073cf"/>
    </style:style>
    <style:style style:name="T9" style:family="text">
      <style:text-properties fo:background-color="#ffffff" loext:char-shading-value="0" style:font-name-asian="Calibri1" style:font-name-complex="Arial"/>
    </style:style>
    <style:style style:name="T10" style:family="text">
      <style:text-properties style:font-name="Calibri" fo:font-size="11pt" style:font-size-asian="11pt" style:language-asian="es" style:country-asian="PE"/>
    </style:style>
    <style:style style:name="T11" style:family="text">
      <style:text-properties fo:font-weight="bold" style:font-weight-asian="bold"/>
    </style:style>
    <style:style style:name="T12" style:family="text">
      <style:text-properties text:display="true"/>
    </style:style>
    <style:style style:name="T13" style:family="text">
      <style:text-properties style:font-size-complex="16pt"/>
    </style:style>
    <style:style style:name="T14" style:family="text">
      <style:text-properties fo:color="#e91e63" loext:opacity="100%" style:font-name="Times New Roman1" fo:font-size="18pt" fo:font-weight="bold" style:font-size-asian="18pt" style:font-weight-asian="bold" style:font-size-complex="18pt" style:font-weight-complex="bold"/>
    </style:style>
    <style:style style:name="T15" style:family="text">
      <style:text-properties officeooo:rsid="002df973"/>
    </style:style>
    <style:style style:name="T16" style:family="text">
      <style:text-properties officeooo:rsid="0035121e"/>
    </style:style>
    <style:style style:name="T17" style:family="text">
      <style:text-properties officeooo:rsid="00393f34"/>
    </style:style>
    <style:style style:name="T18" style:family="text">
      <style:text-properties officeooo:rsid="003a45f8"/>
    </style:style>
    <style:style style:name="T19" style:family="text">
      <style:text-properties fo:font-size="70pt" officeooo:rsid="0078f883" style:font-size-asian="70pt" style:font-size-complex="70pt"/>
    </style:style>
    <style:style style:name="T20" style:family="text">
      <style:text-properties officeooo:rsid="0078f883"/>
    </style:style>
    <style:style style:name="T21" style:family="text">
      <style:text-properties fo:font-family="Arial" style:font-family-generic="swiss" style:font-pitch="variable" fo:font-size="65pt" officeooo:rsid="0078f883" style:font-size-asian="65pt" style:font-size-complex="65pt"/>
    </style:style>
    <style:style style:name="T22" style:family="text">
      <style:text-properties officeooo:rsid="0080a7c2"/>
    </style:style>
    <style:style style:name="T23" style:family="text">
      <style:text-properties fo:font-weight="bold" style:font-weight-asian="bold" style:font-weight-complex="bold"/>
    </style:style>
    <style:style style:name="T24" style:family="text">
      <style:text-properties fo:font-family="Arial" style:font-family-generic="swiss" style:font-pitch="variable"/>
    </style:style>
    <style:style style:name="T25" style:family="text">
      <style:text-properties fo:font-style="italic" style:font-style-asian="italic" style:font-style-complex="italic"/>
    </style:style>
    <style:style style:name="T26" style:family="text">
      <style:text-properties fo:font-style="normal" style:font-style-asian="normal" style:font-style-complex="normal"/>
    </style:style>
    <style:style style:name="T27" style:family="text">
      <style:text-properties officeooo:rsid="00876f78"/>
    </style:style>
    <style:style style:name="T28" style:family="text">
      <style:text-properties officeooo:rsid="00394b32"/>
    </style:style>
    <style:style style:name="T29" style:family="text">
      <style:text-properties fo:color="#e91e63" loext:opacity="100%" style:font-name="Times New Roman1" fo:font-size="12pt" style:font-size-asian="12pt" style:font-size-complex="12pt"/>
    </style:style>
    <style:style style:name="T30" style:family="text">
      <style:text-properties fo:color="#e91e63" loext:opacity="100%"/>
    </style:style>
    <style:style style:name="T31" style:family="text">
      <style:text-properties officeooo:rsid="006d1ba7"/>
    </style:style>
    <style:style style:name="T32" style:family="text">
      <style:text-properties officeooo:rsid="00aa7241"/>
    </style:style>
    <style:style style:name="T33" style:family="text">
      <style:text-properties officeooo:rsid="00abde27"/>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color="#e91e63" loext:opacity="100%" fo:font-style="italic" fo:font-weight="bold" style:font-style-asian="italic" style:font-weight-asian="bold" style:font-style-complex="italic" style:font-weight-complex="bold"/>
    </style:style>
    <style:style style:name="T36" style:family="text">
      <style:text-properties officeooo:rsid="006ee475"/>
    </style:style>
    <style:style style:name="T37" style:family="text">
      <style:text-properties fo:color="#3a3a3a" loext:opacity="100%" fo:font-weight="normal" style:font-weight-asian="normal" style:font-name-complex="Times New Roman2" style:font-size-complex="12pt" loext:padding="0in" loext:border="none" loext:shadow="none"/>
    </style:style>
    <style:style style:name="T38" style:family="text">
      <style:text-properties fo:font-style="normal" fo:font-weight="bold" style:font-style-asian="normal" style:font-weight-asian="bold"/>
    </style:style>
    <style:style style:name="T39" style:family="text">
      <style:text-properties fo:color="#000000" loext:opacity="100%" fo:font-size="11pt" fo:font-weight="bold" style:font-name-asian="Times New Roman2" style:font-size-asian="11pt" style:language-asian="es" style:country-asian="PE" style:font-weight-asian="bold" style:font-name-complex="Times New Roman2" style:font-weight-complex="bold"/>
    </style:style>
    <style:style style:name="T40" style:family="text">
      <style:text-properties fo:color="#000000" loext:opacity="100%" fo:font-size="11pt" style:font-name-asian="Times New Roman2" style:font-size-asian="11pt" style:language-asian="es" style:country-asian="PE" style:font-name-complex="Times New Roman2"/>
    </style:style>
    <style:style style:name="T41" style:family="text">
      <style:text-properties fo:background-color="#ffff00" loext:char-shading-value="0"/>
    </style:style>
    <style:style style:name="T42" style:family="text">
      <style:text-properties fo:font-weight="bold" fo:background-color="#ffff00" loext:char-shading-value="0" style:font-weight-asian="bold"/>
    </style:style>
    <style:style style:name="T43" style:family="text">
      <style:text-properties fo:background-color="#00ffff" loext:char-shading-value="0"/>
    </style:style>
    <style:style style:name="fr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repeat="stretc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auto-grow-height="false" draw:auto-grow-width="false"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0138in" svg:stroke-color="#f44336" draw:marker-start="TriangleMarker" draw:marker-start-width="0.0693in" draw:marker-end="TriangleMarker" draw:marker-end-width="0.0693in" draw:fill="none" fo:padding-top="0.0071in" fo:padding-bottom="0.0071in" fo:padding-left="0.0071in" fo:padding-right="0.0071in" loext:decorative="false" fo:margin-left="0in" fo:margin-right="0in" fo:margin-top="0in" fo:margin-bottom="0in" style:run-through="foreground" style:wrap="run-through" style:number-wrapped-paragraphs="no-limit" style:vertical-pos="from-top" style:vertical-rel="paragraph" style:horizontal-pos="from-left" style:horizontal-rel="char" draw:wrap-influence-on-position="once-concurrent" loext:allow-overlap="true" style:flow-with-text="false"/>
    </style:style>
    <style:style style:name="gr3" style:family="graphic">
      <style:graphic-properties draw:stroke="none" draw:fill="none" draw:auto-grow-height="false" draw:auto-grow-width="false"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draw:fill="none" draw:auto-grow-height="false" draw:auto-grow-width="false" loext:decorative="false" fo:margin-left="0in" fo:margin-right="0in" fo:margin-top="0in" fo:margin-bottom="0in" style:run-through="foreground" style:wrap="run-through" style:number-wrapped-paragraphs="no-limit" style:vertical-pos="from-top" style:vertical-rel="paragraph" style:horizontal-pos="from-left" style:horizontal-rel="char" draw:wrap-influence-on-position="once-concurrent" loext:allow-overlap="true" style:flow-with-text="false"/>
      <style:paragraph-properties style:writing-mode="lr-tb"/>
    </style:style>
    <style:style style:name="gr5" style:family="graphic">
      <style:graphic-properties draw:stroke="solid" svg:stroke-width="0.0138in" svg:stroke-color="#f44336" draw:marker-start="TriangleMarker" draw:marker-start-width="0.0693in" draw:marker-end="TriangleMarker" draw:marker-end-width="0.0693in" draw:fill="none" fo:padding-top="0.0071in" fo:padding-bottom="0.0071in" fo:padding-left="0.0071in" fo:padding-right="0.0071in"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319in" svg:stroke-color="#e91e63" draw:marker-start="Arrowheads_20_1" draw:marker-start-width="0.1866in" draw:marker-end="Arrowheads_20_1" draw:marker-end-width="0.1866in" draw:fill-color="#e91e63" draw:textarea-horizontal-align="center" draw:textarea-vertical-align="middle" fo:padding-top="0.0161in" fo:padding-bottom="0.0161in" fo:padding-left="0.0161in" fo:padding-right="0.016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0.677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463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width="0.0319in" svg:stroke-color="#e91e63" draw:marker-start="Arrowheads_20_1" draw:marker-start-width="0.1866in" draw:marker-end="Arrowheads_20_1" draw:marker-end-width="0.1866in" draw:fill-color="#e91e63" draw:textarea-horizontal-align="center" draw:textarea-vertical-align="middle" fo:padding-top="0.0161in" fo:padding-bottom="0.0161in" fo:padding-left="0.0161in" fo:padding-right="0.016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577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svg:stroke-width="0.0319in" svg:stroke-color="#e91e63" draw:marker-start-width="0.1866in" draw:marker-end="Arrowheads_20_1" draw:marker-end-width="0.1866in" draw:fill-color="#e91e63" draw:textarea-horizontal-align="center" draw:textarea-vertical-align="middle" fo:padding-top="0.0161in" fo:padding-bottom="0.0161in" fo:padding-left="0.0161in" fo:padding-right="0.016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color="#000000" draw:fill="none" draw:fill-color="#ffffff" fo:min-height="0.512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width="0.0319in" svg:stroke-color="#e91e63" draw:marker-start="Arrowheads_20_1" draw:marker-start-width="0.1866in" draw:marker-end-width="0.1866in" draw:fill-color="#e91e63" draw:textarea-horizontal-align="center" draw:textarea-vertical-align="middle" fo:padding-top="0.0161in" fo:padding-bottom="0.0161in" fo:padding-left="0.0161in" fo:padding-right="0.016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000000" draw:fill="none" draw:fill-color="#ffffff" fo:min-height="0.448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svg:stroke-width="0.0209in" svg:stroke-color="#e91e63" draw:marker-start="Arrowheads_20_2" draw:marker-start-width="0.1701in" draw:marker-end="Arrowheads_20_2" draw:marker-end-width="0.1701in" draw:textarea-horizontal-align="center" draw:textarea-vertical-align="middle" fo:padding-top="0.0102in" fo:padding-bottom="0.0102in" fo:padding-left="0.0102in" fo:padding-right="0.0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svg:stroke-color="#000000" draw:fill="none" draw:fill-color="#ffffff" fo:min-height="0.38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svg:stroke-width="0.0209in" svg:stroke-color="#e91e63" draw:marker-start-width="0.1701in" draw:marker-end-width="0.1701in" draw:fill="none" draw:textarea-vertical-align="middle" draw:auto-grow-height="false" fo:min-height="0.8972in" fo:min-width="0.0181in" fo:padding-top="0.0102in" fo:padding-bottom="0.0102in" fo:padding-left="0.0102in" fo:padding-right="0.0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4" draw:name="Text Frame 9" draw:style-name="gr1" draw:text-style-name="P2" svg:width="0.5906in" svg:height="0.3748in" svg:x="2.8764in" svg:y="-0.6008in"><draw:text-box><text:p><text:span text:style-name="T1">2.54cm</text:span></text:p></draw:text-box></draw:frame><text:bookmark-start text:name="_Hlk91550375"/><draw:line text:anchor-type="char" draw:z-index="2" draw:name="Vertical line 1" draw:style-name="gr2" draw:text-style-name="P2" svg:x1="1.9972in" svg:y1="-0.9146in" svg:x2="1.9972in" svg:y2="-0.0283in"><text:p/></draw:line><draw:frame text:anchor-type="char" draw:z-index="13" draw:name="Text Frame 5" draw:style-name="gr3" draw:text-style-name="P2" svg:width="2.0677in" svg:height="0.3748in" svg:x="-1.1201in" svg:y="0.3772in"><draw:text-box><text:p><text:span text:style-name="T1">Nombre de </text:span><text:span text:style-name="T1">la </text:span><text:span text:style-name="T1">universida</text:span><text:span text:style-name="T1">d (22)</text:span></text:p></draw:text-box></draw:frame><text:bookmark-end text:name="_Hlk91550375"/><text:span text:style-name="T2">UNIVERSIDAD NACIONAL DE SAN CRISTÓBAL DE HUAMANGA</text:span></text:p>
      <text:p text:style-name="P3"/>
      <text:p text:style-name="P4"><draw:frame text:anchor-type="char" draw:z-index="14" draw:name="Text Frame 6" draw:style-name="gr3" draw:text-style-name="P2" svg:width="2.0677in" svg:height="0.3748in" svg:x="-1.1472in" svg:y="0.3118in"><draw:text-box><text:p><text:span text:style-name="T1">Nombre de </text:span><text:span text:style-name="T1">la facultad </text:span><text:span text:style-name="T1">(20)</text:span></text:p></draw:text-box></draw:frame><draw:frame text:anchor-type="char" draw:z-index="15" draw:name="Text Frame 7" draw:style-name="gr3" draw:text-style-name="P2" svg:width="2.0677in" svg:height="0.3748in" svg:x="-1.1311in" svg:y="0.8783in"><draw:text-box><text:p><text:span text:style-name="T1">Nombre de </text:span><text:span text:style-name="T1">la escuela </text:span><text:span text:style-name="T1">(18)</text:span></text:p></draw:text-box></draw:frame><text:span text:style-name="T3">FACULTAD</text:span><text:span text:style-name="T4"> DE CIENCIAS ECONÓMICAS, ADMINISTRATIVAS Y CONTABLES</text:span></text:p>
      <text:p text:style-name="P3"/>
      <text:p text:style-name="P5">ESCUELA PROFESIONAL DE ECONOMÍA</text:p>
      <text:p text:style-name="P5"><draw:frame draw:style-name="fr1" draw:name="image2.png" text:anchor-type="char" svg:x="1.6945in" svg:y="0.0602in" svg:width="2.6972in" svg:height="2.5299in" draw:z-index="18"><draw:image xlink:href="Pictures/1000000100000495000004131E8AE1C2.png" xlink:type="simple" xlink:show="embed" xlink:actuate="onLoad" draw:mime-type="image/png"/></draw:frame></text:p>
      <text:p text:style-name="P4"><draw:line text:anchor-type="char" draw:z-index="3" draw:name="Vertical line 3" draw:style-name="gr2" draw:text-style-name="P2" svg:x1="4.0213in" svg:y1="1.1846in" svg:x2="3.1354in" svg:y2="1.1846in"><text:p/></draw:line><draw:frame text:anchor-type="char" draw:z-index="6" draw:name="Text Frame 12" draw:style-name="gr4" draw:text-style-name="P2" svg:width="0.7315in" svg:height="0.3748in" svg:x="3.2228in" svg:y="0.9555in"><draw:text-box><text:p><text:span text:style-name="T1">2.54cm</text:span></text:p></draw:text-box></draw:frame><draw:line text:anchor-type="char" draw:z-index="8" draw:name="Vertical line 4" draw:style-name="gr2" draw:text-style-name="P2" svg:x1="-3.2185in" svg:y1="1.2472in" svg:x2="-4.1047in" svg:y2="1.2472in"><text:p/></draw:line><draw:frame text:anchor-type="char" draw:z-index="16" draw:name="Text Frame 8" draw:style-name="gr4" draw:text-style-name="P2" svg:width="2.0677in" svg:height="0.3748in" svg:x="-3.0618in" svg:y="-1.7661in"><draw:text-box><text:p><text:span text:style-name="T1">Logo de la universidad</text:span></text:p></draw:text-box></draw:frame></text:p>
      <text:p text:style-name="P6"><draw:frame text:anchor-type="char" draw:z-index="10" draw:name="Text Frame 1" draw:style-name="gr4" draw:text-style-name="P2" svg:width="1.674in" svg:height="0.3748in" svg:x="-2.0583in" svg:y="0.2173in"><draw:text-box><text:p><text:span text:style-name="T5">Título de monografía (16)</text:span></text:p></draw:text-box></draw:frame><text:span text:style-name="T6">Desigualad socioeconómica y la pobreza en el</text:span></text:p>
      <text:p text:style-name="P7">departamento Ayacucho, periodo 2000-2019</text:p>
      <text:p text:style-name="P8"><draw:frame text:anchor-type="char" draw:z-index="9" draw:name="Text Frame 11" draw:style-name="gr3" draw:text-style-name="P2" svg:width="0.5906in" svg:height="0.3748in" svg:x="-0.8382in" svg:y="0.0339in"><draw:text-box><text:p><text:span text:style-name="T1">3.81cm</text:span></text:p></draw:text-box></draw:frame>Trabajo de monografía</text:p>
      <text:p text:style-name="P9"/>
      <text:p text:style-name="P10">Presentado por:</text:p>
      <text:p text:style-name="P9"><draw:frame text:anchor-type="char" draw:z-index="11" draw:name="Text Frame 2" draw:style-name="gr3" draw:text-style-name="P2" svg:width="2.0677in" svg:height="0.3748in" svg:x="-1.0484in" svg:y="0.1083in"><draw:text-box><text:p><text:span text:style-name="T5">Nombre de los estudiantes (12)</text:span></text:p></draw:text-box></draw:frame></text:p>
      <text:list text:style-name="WWNum25">
        <text:list-item>
          <text:p text:style-name="P11"><text:span text:style-name="T7">Nombre</text:span> <text:span text:style-name="T7">APPELLIDO APELLIDO</text:span></text:p>
        </text:list-item>
        <text:list-item>
          <text:p text:style-name="P11">Nombre APPELLIDO APELLIDO</text:p>
        </text:list-item>
      </text:list>
      <text:p text:style-name="P9"/>
      <text:p text:style-name="P10"><draw:frame text:anchor-type="char" draw:z-index="12" draw:name="Text Frame 3" draw:style-name="gr4" draw:text-style-name="P2" svg:width="2.0677in" svg:height="0.3748in" svg:x="-2.4752in" svg:y="0.0244in"><draw:text-box><text:p><text:span text:style-name="T5">Nombre de docente (16)</text:span></text:p></draw:text-box></draw:frame>Profesor: Dr. Pelayo HILARIO VALENZUELA</text:p>
      <text:p text:style-name="P9"/>
      <text:p text:style-name="P6"><draw:frame text:anchor-type="char" draw:z-index="17" draw:name="Text Frame 13" draw:style-name="gr3" draw:text-style-name="P2" svg:width="2.0677in" svg:height="0.3748in" svg:x="0.2465in" svg:y="0.2354in"><draw:text-box><text:p><text:span text:style-name="T5">Lugar y fecha (16)</text:span></text:p></draw:text-box></draw:frame>Ayacucho - Perú</text:p>
      <text:p text:style-name="P6"><text:bookmark-start text:name="_Toc75262144"/>Enero, 202<draw:line text:anchor-type="char" draw:z-index="5" draw:name="Vertical line 5" draw:style-name="gr5" draw:text-style-name="P2" svg:x1="3.0358in" svg:y1="0.5732in" svg:x2="3.0358in" svg:y2="1.4594in"><text:p/></draw:line><draw:frame text:anchor-type="char" draw:z-index="7" draw:name="Text Frame 4" draw:style-name="gr3" draw:text-style-name="P12" svg:width="0.863in" svg:height="0.3748in" svg:x="3.2866in" svg:y="0.8402in"><draw:text-box><text:p><text:span text:style-name="T1">2.54cm</text:span></text:p></draw:text-box></draw:frame><text:bookmark-end text:name="_Toc75262144"/><text:span text:style-name="T8">6</text:span></text:p>
      <text:p text:style-name="P13">DEDICATORIA</text:p>
      <text:p text:style-name="P14" loext:marker-style-name="T9"/>
      <text:p text:style-name="P15">AGRADECIMIENTO</text:p>
      <text:p text:style-name="P14" loext:marker-style-name="T9"/>
      <text:table-of-content text:style-name="Sect1" text:protected="true" text:name="Sumario1">
        <text:table-of-content-source text:outline-level="3" text:use-index-marks="false">
          <text:index-title-template text:style-name="Contents_20_Heading">ÍNDICE</text:index-title-template>
          <text:table-of-content-entry-template text:outline-level="1" text:style-name="Contents_20_1">
            <text:index-entry-link-start text:style-name="Index_20_Link"/>
            <text:index-entry-chapter/>
            <text:index-entry-tab-stop style:type="left" style:position="0.333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61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9165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16">ÍNDICE</text:p>
          </text:index-title>
          <text:p text:style-name="P17"><text:a xlink:type="simple" xlink:href="#__RefHeading___Toc3707_3540835330" text:style-name="Index_20_Link" text:visited-style-name="Index_20_Link">1.<text:tab/>Capítulo I Tamaño de papel<text:tab/>7</text:a></text:p>
          <text:p text:style-name="P17"><text:a xlink:type="simple" xlink:href="#__RefHeading___Toc3709_3540835330" text:style-name="Index_20_Link" text:visited-style-name="Index_20_Link">2.<text:tab/>Capítulo II Márgenes<text:tab/>8</text:a></text:p>
          <text:p text:style-name="P18"><text:a xlink:type="simple" xlink:href="#__RefHeading___Toc7175_3540835330" text:style-name="Index_20_Link" text:visited-style-name="Index_20_Link">2.1.<text:tab/>Márgenes para trabajos encuadernados<text:tab/>8</text:a></text:p>
          <text:p text:style-name="P17"><text:a xlink:type="simple" xlink:href="#__RefHeading___Toc3711_3540835330" text:style-name="Index_20_Link" text:visited-style-name="Index_20_Link">3.<text:tab/>Capítulo III Tipo y Tamaño de Fuente<text:tab/>9</text:a></text:p>
          <text:p text:style-name="P18"><text:a xlink:type="simple" xlink:href="#__RefHeading___Toc7177_3540835330" text:style-name="Index_20_Link" text:visited-style-name="Index_20_Link">3.1.<text:tab/>¡Y yo que pensaba que la mejor era la Arial!<text:tab/>9</text:a></text:p>
          <text:p text:style-name="P18"><text:a xlink:type="simple" xlink:href="#__RefHeading___Toc7179_3540835330" text:style-name="Index_20_Link" text:visited-style-name="Index_20_Link">3.2.<text:tab/>¡A mí no me grite!<text:tab/>10</text:a></text:p>
          <text:p text:style-name="P18"><text:a xlink:type="simple" xlink:href="#__RefHeading___Toc3713_3540835330" text:style-name="Index_20_Link" text:visited-style-name="Index_20_Link">3.3.<text:tab/>Tipo de fuentes recomendadas<text:tab/>11</text:a></text:p>
          <text:p text:style-name="P19"><text:a xlink:type="simple" xlink:href="#__RefHeading___Toc3715_3540835330" text:style-name="Index_20_Link" text:visited-style-name="Index_20_Link">3.3.1.<text:tab/>Sin serifas<text:tab/>11</text:a></text:p>
          <text:p text:style-name="P19"><text:a xlink:type="simple" xlink:href="#__RefHeading___Toc3717_3540835330" text:style-name="Index_20_Link" text:visited-style-name="Index_20_Link">3.3.2.<text:tab/>Con serifas<text:tab/>11</text:a></text:p>
          <text:p text:style-name="P18"><text:a xlink:type="simple" xlink:href="#__RefHeading___Toc3719_3540835330" text:style-name="Index_20_Link" text:visited-style-name="Index_20_Link">3.4.<text:tab/>Tamaño de fuente<text:tab/>11</text:a></text:p>
          <text:p text:style-name="P17"><text:a xlink:type="simple" xlink:href="#__RefHeading___Toc3721_3540835330" text:style-name="Index_20_Link" text:visited-style-name="Index_20_Link">4.<text:tab/>Capítulo IV Encabezado – Numeración, título abreviado (running head)<text:tab/>12</text:a></text:p>
          <text:p text:style-name="P18"><text:a xlink:type="simple" xlink:href="#__RefHeading___Toc3723_3540835330" text:style-name="Index_20_Link" text:visited-style-name="Index_20_Link">4.1.<text:tab/>Portada de estudiantes<text:tab/>12</text:a></text:p>
          <text:p text:style-name="P18"><text:a xlink:type="simple" xlink:href="#__RefHeading___Toc3725_3540835330" text:style-name="Index_20_Link" text:visited-style-name="Index_20_Link">4.2.<text:tab/>Portada profesional<text:tab/>12</text:a></text:p>
          <text:p text:style-name="P18"><text:a xlink:type="simple" xlink:href="#__RefHeading___Toc3727_3540835330" text:style-name="Index_20_Link" text:visited-style-name="Index_20_Link">4.3.<text:tab/>Numeración de páginas<text:tab/>13</text:a></text:p>
          <text:p text:style-name="P18"><text:a xlink:type="simple" xlink:href="#__RefHeading___Toc3729_3540835330" text:style-name="Index_20_Link" text:visited-style-name="Index_20_Link">4.4.<text:tab/>Título corto, titulillo (running head)<text:tab/>13</text:a></text:p>
          <text:p text:style-name="P18"><text:a xlink:type="simple" xlink:href="#__RefHeading___Toc3731_3540835330" text:style-name="Index_20_Link" text:visited-style-name="Index_20_Link">4.5.<text:tab/>Cómo configurar el encabezado en Word<text:tab/>14</text:a></text:p>
          <text:p text:style-name="P17"><text:a xlink:type="simple" xlink:href="#__RefHeading___Toc4727_3540835330" text:style-name="Index_20_Link" text:visited-style-name="Index_20_Link">5.<text:tab/>Capítulo V Interlineado de Párrafo<text:tab/>14</text:a></text:p>
          <text:p text:style-name="P18"><text:a xlink:type="simple" xlink:href="#__RefHeading___Toc4729_3540835330" text:style-name="Index_20_Link" text:visited-style-name="Index_20_Link">5.1.<text:tab/>Excepciones<text:tab/>14</text:a></text:p>
          <text:p text:style-name="P18"><text:a xlink:type="simple" xlink:href="#__RefHeading___Toc4731_3540835330" text:style-name="Index_20_Link" text:visited-style-name="Index_20_Link">5.2.<text:tab/>¿Cuándo agregar una línea extra entre párrafo?<text:tab/>16</text:a></text:p>
          <text:p text:style-name="P17"><text:a xlink:type="simple" xlink:href="#__RefHeading___Toc4733_3540835330" text:style-name="Index_20_Link" text:visited-style-name="Index_20_Link">6.<text:tab/>Capítulo VI Alineación y Sangría de Párrafo<text:tab/>16</text:a></text:p>
          <text:p text:style-name="P18"><text:a xlink:type="simple" xlink:href="#__RefHeading___Toc4735_3540835330" text:style-name="Index_20_Link" text:visited-style-name="Index_20_Link">6.1.<text:tab/>Alineación de párrafo<text:tab/>16</text:a></text:p>
          <text:p text:style-name="P18"><text:a xlink:type="simple" xlink:href="#__RefHeading___Toc4737_3540835330" text:style-name="Index_20_Link" text:visited-style-name="Index_20_Link"><text:soft-page-break/>6.2.<text:tab/>Separación de sílabas<text:tab/>16</text:a></text:p>
          <text:p text:style-name="P18"><text:a xlink:type="simple" xlink:href="#__RefHeading___Toc4739_3540835330" text:style-name="Index_20_Link" text:visited-style-name="Index_20_Link">6.3.<text:tab/>Sangría de párrafo<text:tab/>16</text:a></text:p>
          <text:p text:style-name="P18"><text:a xlink:type="simple" xlink:href="#__RefHeading___Toc4741_3540835330" text:style-name="Index_20_Link" text:visited-style-name="Index_20_Link">6.4.<text:tab/>Excepciones de alineado y sangría de parráfo<text:tab/>17</text:a></text:p>
          <text:p text:style-name="P17"><text:a xlink:type="simple" xlink:href="#__RefHeading___Toc3733_3540835330" text:style-name="Index_20_Link" text:visited-style-name="Index_20_Link">7.<text:tab/>Capítulo VII Títulos y Subtítulos<text:tab/>17</text:a></text:p>
          <text:p text:style-name="P18"><text:a xlink:type="simple" xlink:href="#__RefHeading___Toc3735_3540835330" text:style-name="Index_20_Link" text:visited-style-name="Index_20_Link">7.1.<text:tab/>Título Nivel 2<text:tab/>18</text:a></text:p>
          <text:p text:style-name="P19"><text:a xlink:type="simple" xlink:href="#__RefHeading___Toc3737_3540835330" text:style-name="Index_20_Link" text:visited-style-name="Index_20_Link">7.1.1.<text:tab/>Título Nivel 3<text:tab/>18</text:a></text:p>
          <text:p text:style-name="P18"><text:a xlink:type="simple" xlink:href="#__RefHeading___Toc4743_3540835330" text:style-name="Index_20_Link" text:visited-style-name="Index_20_Link">7.2.<text:tab/>Título en la Introducción<text:tab/>19</text:a></text:p>
          <text:p text:style-name="P17"><text:a xlink:type="simple" xlink:href="#__RefHeading___Toc3739_3540835330" text:style-name="Index_20_Link" text:visited-style-name="Index_20_Link">8.<text:tab/>Capítulo VIII<text:tab/>19</text:a></text:p>
          <text:p text:style-name="P18"><text:a xlink:type="simple" xlink:href="#__RefHeading___Toc3741_3540835330" text:style-name="Index_20_Link" text:visited-style-name="Index_20_Link">8.1.<text:tab/>Título nivel 2<text:tab/>19</text:a></text:p>
          <text:p text:style-name="P19"><text:a xlink:type="simple" xlink:href="#__RefHeading___Toc3743_3540835330" text:style-name="Index_20_Link" text:visited-style-name="Index_20_Link">8.1.1.<text:tab/>Título nivel 3<text:tab/>19</text:a></text:p>
          <text:p text:style-name="P17"><text:a xlink:type="simple" xlink:href="#__RefHeading___Toc3745_3540835330" text:style-name="Index_20_Link" text:visited-style-name="Index_20_Link">9.<text:tab/>Capítulo IX Tablas y Figuras<text:tab/>20</text:a></text:p>
          <text:p text:style-name="P18"><text:a xlink:type="simple" xlink:href="#__RefHeading___Toc3747_3540835330" text:style-name="Index_20_Link" text:visited-style-name="Index_20_Link">9.1.<text:tab/>Tablas APA 7ma edición<text:tab/>20</text:a></text:p>
          <text:p text:style-name="P18"><text:a xlink:type="simple" xlink:href="#__RefHeading___Toc3749_3540835330" text:style-name="Index_20_Link" text:visited-style-name="Index_20_Link">9.2.<text:tab/>Figuras APA 7ma edición<text:tab/>21</text:a></text:p>
          <text:p text:style-name="P17"><text:a xlink:type="simple" xlink:href="#__RefHeading___Toc3751_3540835330" text:style-name="Index_20_Link" text:visited-style-name="Index_20_Link">10.<text:tab/>Capítulo X Citas y Referencias<text:tab/>23</text:a></text:p>
          <text:p text:style-name="P18"><text:a xlink:type="simple" xlink:href="#__RefHeading___Toc7181_3540835330" text:style-name="Index_20_Link" text:visited-style-name="Index_20_Link">10.1.<text:tab/>Citas Directas<text:tab/>23</text:a></text:p>
          <text:p text:style-name="P18"><text:a xlink:type="simple" xlink:href="#__RefHeading___Toc7183_3540835330" text:style-name="Index_20_Link" text:visited-style-name="Index_20_Link">10.2.<text:tab/>Citas Indirectas<text:tab/>24</text:a></text:p>
        </text:index-body>
      </text:table-of-content>
      <text:p text:style-name="P20" loext:marker-style-name="T9"/>
      <text:p text:style-name="APA_20_Párrafo"/>
      <text:p text:style-name="P14" loext:marker-style-name="T9"/>
      <text:p text:style-name="P14" loext:marker-style-name="T9"/>
      <text:p text:style-name="P15">ÍNDICE DE TABLAS</text:p>
      <text:illustration-index text:style-name="Sect1" text:protected="true" text:name="Índice de figuras1">
        <text:illustration-index-source text:caption-sequence-name="Table"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21" loext:marker-style-name="T10"><text:a xlink:type="simple" xlink:href="#_Toc35446746" text:style-name="Index_20_Link" text:visited-style-name="Index_20_Link"><text:span text:style-name="T11">Tabla 1</text:span> El título debe ser claro y descriptivo.<text:span text:style-name="T12"><text:tab/>8</text:span></text:a></text:p>
          <text:p text:style-name="P21" loext:marker-style-name="T10"><text:a xlink:type="simple" xlink:href="#_Toc35446747" text:style-name="Index_20_Link" text:visited-style-name="Index_20_Link"><text:span text:style-name="T11">Tabla 2</text:span> asdasdsadsadad.<text:span text:style-name="T12"><text:tab/>8</text:span></text:a></text:p>
          <text:p text:style-name="P21" loext:marker-style-name="T10"><text:a xlink:type="simple" xlink:href="#_Toc35446748" text:style-name="Index_20_Link" text:visited-style-name="Index_20_Link"><text:span text:style-name="T11">Tabla 3</text:span> El título debe ser claro y descriptivo<text:span text:style-name="T12"><text:tab/>9</text:span></text:a></text:p>
        </text:index-body>
      </text:illustration-index>
      <text:p text:style-name="P14" loext:marker-style-name="T9"/>
      <text:p text:style-name="P14" loext:marker-style-name="T9"/>
      <text:p text:style-name="P14" loext:marker-style-name="T9"/>
      <text:p text:style-name="P15">ÍNDICE DE FIGURAS</text:p>
      <text:illustration-index text:style-name="Sect1" text:protected="true" text:name="Índice de figuras2">
        <text:illustration-index-source text:caption-sequence-name="Figure"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21" loext:marker-style-name="T10"><text:a xlink:type="simple" xlink:href="#_Toc35446644" text:style-name="Index_20_Link" text:visited-style-name="Index_20_Link"><text:span text:style-name="T11">Figura 1</text:span> el titulo debe ser breve y conciso<text:span text:style-name="T12"><text:tab/>9</text:span></text:a></text:p>
          <text:p text:style-name="P21" loext:marker-style-name="T10"><text:a xlink:type="simple" xlink:href="#_Toc35446645" text:style-name="Index_20_Link" text:visited-style-name="Index_20_Link"><text:span text:style-name="T11">Figura 2</text:span> xxxxxxxxxxxxxxxxx<text:span text:style-name="T12"><text:tab/>10</text:span></text:a></text:p>
        </text:index-body>
      </text:illustration-index>
      <text:p text:style-name="P22" loext:marker-style-name="T13"/>
      <text:h text:style-name="P23" text:outline-level="1"><text:bookmark-start text:name="__RefHeading___Toc3707_3540835330"/>Capítulo I<text:line-break/>Tamaño de papel<text:bookmark-end text:name="__RefHeading___Toc3707_3540835330"/></text:h>
      <text:p text:style-name="P24"/>
      <text:p text:style-name="P24"><draw:line text:anchor-type="paragraph" draw:z-index="19" draw:name="Line 1" draw:style-name="gr6" draw:text-style-name="P25" svg:x1="5.1in" svg:y1="9.1272in" svg:x2="5.1004in" svg:y2="-1.7366in"><text:p/></draw:line></text:p>
      <text:p text:style-name="P24"/>
      <text:p text:style-name="P24"/>
      <text:p text:style-name="P24"/>
      <text:p text:style-name="P24"/>
      <text:p text:style-name="P24"/>
      <text:p text:style-name="P24"/>
      <text:p text:style-name="P24"><draw:frame text:anchor-type="paragraph" draw:z-index="21" draw:name="Text Frame 10" draw:style-name="gr7" draw:text-style-name="P26" svg:width="2.1878in" svg:height="0.6776in" svg:x="3.9618in" svg:y="0.0898in"><draw:text-box><text:p><text:span text:style-name="T14">27.94 cm</text:span></text:p></draw:text-box></draw:frame></text:p>
      <text:p text:style-name="P24"/>
      <text:p text:style-name="P24"/>
      <text:p text:style-name="P24"/>
      <text:p text:style-name="P24"/>
      <text:p text:style-name="P24"/>
      <text:p text:style-name="P24"/>
      <text:p text:style-name="P24"/>
      <text:p text:style-name="P24"/>
      <text:p text:style-name="P24"/>
      <text:p text:style-name="P24"><draw:line text:anchor-type="paragraph" draw:z-index="20" draw:name="Line 2" draw:style-name="gr6" draw:text-style-name="P25" svg:x1="-1.0134in" svg:y1="0.0898in" svg:x2="6.8217in" svg:y2="0.0898in"><text:p/></draw:line><draw:frame text:anchor-type="paragraph" draw:z-index="22" draw:name="Text Frame 14" draw:style-name="gr7" draw:text-style-name="P26" svg:width="2.1878in" svg:height="0.6776in" svg:x="1.7354in" svg:y="-0.4075in"><draw:text-box><text:p><text:span text:style-name="T14">21.59 cm</text:span></text:p></draw:text-box></draw:frame><draw:frame text:anchor-type="paragraph" draw:z-index="23" draw:name="Text Frame 15" draw:style-name="gr7" draw:text-style-name="P26" svg:width="3.2287in" svg:height="0.6776in" svg:x="0.0429in" svg:y="1.5681in"><draw:text-box><text:p><text:span text:style-name="T14">PAPEL TAMAÑO A4</text:span></text:p></draw:text-box></draw:frame></text:p>
      <text:p text:style-name="APA_20_Párrafo"/>
      <text:h text:style-name="P27" text:outline-level="1"><draw:frame text:anchor-type="paragraph" draw:z-index="29" draw:name="Text Frame 20" draw:style-name="gr8" draw:text-style-name="P26" svg:width="1.0024in" svg:height="0.4642in" svg:x="-1.0071in" svg:y="3.3161in"><draw:text-box><text:p><text:span text:style-name="T14">3.81 cm</text:span></text:p></draw:text-box></draw:frame><text:bookmark-start text:name="_Toc75262145"/><text:bookmark-start text:name="__RefHeading___Toc3709_3540835330"/><text:soft-page-break/>Capítulo <text:span text:style-name="T15">II</text:span> <text:line-break/><text:bookmark-end text:name="_Toc75262145"/><text:span text:style-name="APA_20_Párrafo_20_Car"><text:span text:style-name="T16">Márgenes</text:span></text:span><text:bookmark-end text:name="__RefHeading___Toc3709_3540835330"/></text:h>
      <text:p text:style-name="P28"><text:span text:style-name="APA_20_Párrafo_20_Car">Antes de iniciar a escribir tu texto en formato APA, sugerimos que configures el tamaño de página, así como los márgenes del documento.</text:span></text:p>
      <text:p text:style-name="P28"><draw:line text:anchor-type="paragraph" draw:z-index="28" draw:name="Line 7" draw:style-name="gr9" draw:text-style-name="P25" svg:x1="-1.1445in" svg:y1="2.4524in" svg:x2="-0.1606in" svg:y2="2.4524in"><text:p text:style-name="P29"><text:s text:c="2"/></text:p></draw:line><draw:frame text:anchor-type="paragraph" draw:z-index="30" draw:name="Text Frame 21" draw:style-name="gr8" draw:text-style-name="P26" svg:width="1.0024in" svg:height="0.4642in" svg:x="6.0807in" svg:y="1.872in"><draw:text-box><text:p><text:span text:style-name="T14">2.54 cm</text:span></text:p></draw:text-box></draw:frame><draw:line text:anchor-type="paragraph" draw:z-index="31" draw:name="Line 8" draw:style-name="gr6" draw:text-style-name="P25" svg:x1="6.0744in" svg:y1="2.4524in" svg:x2="7.0583in" svg:y2="2.4524in"><text:p/></draw:line><draw:line text:anchor-type="paragraph" draw:z-index="32" draw:name="Line 10" draw:style-name="gr6" draw:text-style-name="P25" svg:x1="3in" svg:y1="8.9736in" svg:x2="3.0004in" svg:y2="8.1862in"><text:p/></draw:line><draw:frame text:anchor-type="paragraph" draw:z-index="35" draw:name="Text Frame 23" draw:style-name="gr8" draw:text-style-name="P26" svg:width="1.0024in" svg:height="0.4642in" svg:x="1.8807in" svg:y="8.4346in"><draw:text-box><text:p><text:span text:style-name="T14">2.54 cm</text:span></text:p></draw:text-box></draw:frame><text:span text:style-name="APA_20_Párrafo_20_Car">El tamaño de los márgenes en formato APA debe ser de 2.54 cm (equivalente a 1 pulgada) de todos los lados. Es decir, debes aplicar un margen de 2,54 cm a la margen superior, inferior, derecha e izquierda.</text:span></text:p>
      <text:p text:style-name="P28"><text:span text:style-name="APA_20_Párrafo_20_Car">Puedes hacerlo siguiendo las instrucciones de la imagen abajo.</text:span><draw:frame draw:style-name="fr2" draw:name="Image1" text:anchor-type="char" svg:width="4.1118in" svg:height="4.4862in" draw:z-index="36"><draw:image xlink:href="Pictures/10000000000001B8000001E079FE233B.png" xlink:type="simple" xlink:show="embed" xlink:actuate="onLoad" draw:mime-type="image/png"/></draw:frame></text:p>
      <text:h text:style-name="Heading_20_2" text:outline-level="2"><draw:frame text:anchor-type="paragraph" draw:z-index="33" draw:name="Text Frame 22" draw:style-name="gr8" draw:text-style-name="P26" svg:width="1.0024in" svg:height="0.4642in" svg:x="1.8634in" svg:y="-8.3866in"><draw:text-box><text:p><text:span text:style-name="T14">2.54 cm</text:span></text:p></draw:text-box></draw:frame><draw:line text:anchor-type="paragraph" draw:z-index="34" draw:name="Line 9" draw:style-name="gr6" draw:text-style-name="P25" svg:x1="3in" svg:y1="-7.8264in" svg:x2="3.0004in" svg:y2="-8.6138in"><text:p/></draw:line><text:bookmark-start text:name="__RefHeading___Toc7175_3540835330"/><text:span text:style-name="APA_20_Párrafo_20_Car">Márgenes para trabajos encuadernados</text:span><text:bookmark-end text:name="__RefHeading___Toc7175_3540835330"/></text:h>
      <text:p text:style-name="P28"><text:span text:style-name="APA_20_Párrafo_20_Car">Las disertaciones y tesis pueden tener diferentes requisitos de margen si se van encuadernar. Por ejemplo, márgen izquierdo de 1.5 pulgadas (3.81 cm). Este punto puede variar de acuerdo a cada universidad</text:span></text:p>
      <text:h text:style-name="Heading_20_1" text:outline-level="1"><text:bookmark-start text:name="__RefHeading___Toc3711_3540835330"/><text:soft-page-break/><text:span text:style-name="APA_20_Párrafo_20_Car">Capítulo I</text:span><text:span text:style-name="APA_20_Párrafo_20_Car"><text:span text:style-name="T17">II<text:line-break/></text:span></text:span><text:span text:style-name="APA_20_Párrafo_20_Car"><text:span text:style-name="T18">Tipo y </text:span></text:span><text:span text:style-name="APA_20_Párrafo_20_Car">T</text:span><text:span text:style-name="APA_20_Párrafo_20_Car"><text:span text:style-name="T18">amaño de Fuente</text:span></text:span><text:bookmark-end text:name="__RefHeading___Toc3711_3540835330"/></text:h>
      <text:p text:style-name="P28"><text:span text:style-name="APA_20_Párrafo_20_Car">Es claro que de acuerdo al tipo y tamaño de fuente que elijas para tu texto, será más fácil o más difícil leer el texto. Existen miles de estilos de fuente diferentes en Internet, aunque en APA se sugiere utilizar los tipos de fuentes más comunes.</text:span></text:p>
      <text:p text:style-name="P28"><text:span text:style-name="APA_20_Párrafo_20_Car">El primer paso es que sepas la diferencia entre fuentes con serifa y fuentes sin serifa. Y la mejor manera de entender qué són las serifas es viendo una imagen comparativa entre una fuente con serifa y una fuente sin serifas.</text:span></text:p>
      <text:p text:style-name="P30"><text:span text:style-name="APA_20_Párrafo_20_Car"><text:span text:style-name="T19">F</text:span></text:span><text:span text:style-name="APA_20_Párrafo_20_Car"><text:span text:style-name="T20"> </text:span></text:span><text:span text:style-name="APA_20_Párrafo_20_Car"><text:span text:style-name="T21">F</text:span></text:span></text:p>
      <text:p text:style-name="APA_20_Párrafo"><text:span text:style-name="APA_20_Párrafo_20_Car">A la izquierda, la fuente Times New Roman (una fuente con serifas) y a la derecha la fuente Arial (una fuente sin serifas).</text:span></text:p>
      <text:h text:style-name="Heading_20_2" text:outline-level="2"><text:bookmark-start text:name="__RefHeading___Toc7177_3540835330"/><text:span text:style-name="APA_20_Párrafo_20_Car">¡Y yo que pensaba que la mejor era la Arial!</text:span><text:bookmark-end text:name="__RefHeading___Toc7177_3540835330"/></text:h>
      <text:p text:style-name="P31"><text:span text:style-name="APA_20_Párrafo_20_Car">Escriba en letra romana la i </text:span><text:span text:style-name="APA_20_Párrafo_20_Car"><text:span text:style-name="T22">l</text:span></text:span><text:span text:style-name="APA_20_Párrafo_20_Car">atina mayúscula, </text:span><text:span text:style-name="APA_20_Párrafo_20_Car"><text:span text:style-name="T23">I</text:span></text:span><text:span text:style-name="APA_20_Párrafo_20_Car">, y la ele minúscula, </text:span><text:span text:style-name="APA_20_Párrafo_20_Car"><text:span text:style-name="T23">1</text:span></text:span><text:span text:style-name="APA_20_Párrafo_20_Car">. Observe que cada carácter es distinto. La i mayúscula </text:span><text:span text:style-name="APA_20_Párrafo_20_Car"><text:span text:style-name="T23">(I)</text:span></text:span><text:span text:style-name="APA_20_Párrafo_20_Car"> tiene líneas horizontales que la flanquean arriba y abajo, mientras que la ele minúscula </text:span><text:span text:style-name="APA_20_Párrafo_20_Car"><text:span text:style-name="T23">(1) </text:span></text:span><text:span text:style-name="APA_20_Párrafo_20_Car">tiene una línea oblicua en la parte izquierda superior y una línea horizontal abajo. ¡Definitivamente son distintas!</text:span></text:p>
      <text:p text:style-name="P31"><text:span text:style-name="APA_20_Párrafo_20_Car">Haga lo mismo con el tipo Arial. Mire la i latina mayúscula, </text:span><text:span text:style-name="APA_20_Párrafo_20_Car"><text:span text:style-name="T24">I,</text:span></text:span><text:span text:style-name="APA_20_Párrafo_20_Car"> y la ele minúscula, </text:span><text:span text:style-name="APA_20_Párrafo_20_Car"><text:span text:style-name="T24">I</text:span></text:span><text:span text:style-name="APA_20_Párrafo_20_Car">. ¡Son iguales! Permítame mostrarle el problema con un ejemplo. Vea el <text:s/>siguiente texto, escrito en letra Arial. </text:span></text:p>
      <text:p text:style-name="P31"><text:span text:style-name="APA_20_Párrafo_20_Car"><text:span text:style-name="T24">Iliana llama a la llama de liona.</text:span></text:span></text:p>
      <text:p text:style-name="P28"><text:span text:style-name="APA_20_Párrafo_20_Car">¿Qué dice? Es un texto que tiene por lo menos dos lecturas posibles: </text:span><text:span text:style-name="APA_20_Párrafo_20_Car"><text:span text:style-name="T25">Lliana llama a la llama de Liona o, la que parece más verosímil, Iliana llama a la llama de liona.</text:span></text:span></text:p>
      <text:p text:style-name="P28"><text:soft-page-break/><text:span text:style-name="APA_20_Párrafo_20_Car"><text:span text:style-name="T26">Está supercomprobado que la letra romana, llámese CaJisto MT, Garamond, Minion, Times New Román..., es la más clara para leer. No lo dude. Y si lo duda, vaya a una biblioteca y ojee libros de editoriales reconocidas y prestigiosas. ¿En qué tipo de letra está escrito el texto? ¡Compruébelo usted mismo!</text:span></text:span></text:p>
      <text:h text:style-name="Heading_20_2" text:outline-level="2"><text:bookmark-start text:name="__RefHeading___Toc7179_3540835330"/><text:span text:style-name="APA_20_Párrafo_20_Car">¡A mí no me grite!</text:span><text:bookmark-end text:name="__RefHeading___Toc7179_3540835330"/></text:h>
      <text:p text:style-name="P28"><text:span text:style-name="APA_20_Párrafo_20_Car">Otra falsa creencia es que la mayúscula fija o sostenida hace más claro el texto. Todavía hay quien acude a la mayúscula fija en toda la mitad de una carta o de un artículo periodístico para resaltar una frase, un renglón o incluso, ¡qué horror!, un párrafo entero.</text:span></text:p>
      <text:p text:style-name="P28"><text:span text:style-name="APA_20_Párrafo_20_Car"><text:span text:style-name="T27">E</text:span></text:span><text:span text:style-name="APA_20_Párrafo_20_Car">scriba un renglón cualquiera en mayúscula fija y, luego, tape con una hoja la mitad superior del renglón, de tal manera que solo queden a la vista las páticas de las letras. Intente leer (¡bueno, usted ya sabe lo que dice!) o pídale a alguien más que descifre el texto, o lo que queda de él. Quizá lo logre, pero sin duda encontrará gran dificultad, pues las patas de las letras mayúsculas son muy parecidas. F T IY P H tienen patas iguáleselo mismo que E L. Las puntiagudas W V Ñ N Mse pueden confundir entre sí. Solo las redondas Q O C D U G podrían dar pistas definitivas al intérprete.</text:span></text:p>
      <text:p text:style-name="P28"><text:span text:style-name="APA_20_Párrafo_20_Car">Ahora haga el mismo experimento con un renglón escrito en minúsculas. Observe que la lectura resulta mucho más fácil, pues los caracteres minúsculos se distinguen más entre sí. La principal dificultad aparecerá con i 1 f, o con h n m ñ, pero la diferencia contundente de g j y p q, cuyas colas son incon­fundibles, harán más rápida la solución.</text:span></text:p>
      <text:p text:style-name="P28"><text:span text:style-name="APA_20_Párrafo_20_Car"/></text:p>
      <text:p text:style-name="P28"><text:span text:style-name="APA_20_Párrafo_20_Car"/></text:p>
      <text:p text:style-name="P28"><text:span text:style-name="APA_20_Párrafo_20_Car"/></text:p>
      <text:p text:style-name="P28"><text:span text:style-name="APA_20_Párrafo_20_Car"/></text:p>
      <text:p text:style-name="P28"><text:span text:style-name="APA_20_Párrafo_20_Car"/></text:p>
      <text:p text:style-name="P28"><text:span text:style-name="APA_20_Párrafo_20_Car"/></text:p>
      <text:h text:style-name="Heading_20_2" text:outline-level="2"><text:bookmark-start text:name="__RefHeading___Toc3713_3540835330"/><text:soft-page-break/><text:span text:style-name="APA_20_Párrafo_20_Car">Tipo de fuentes recomendadas</text:span><text:bookmark-end text:name="__RefHeading___Toc3713_3540835330"/></text:h>
      <text:h text:style-name="Heading_20_3" text:outline-level="3"><text:bookmark-start text:name="__RefHeading___Toc3715_3540835330"/><draw:frame draw:style-name="fr3" draw:name="Image3" text:anchor-type="char" svg:x="0.5535in" svg:y="0.1311in" svg:width="4.998in" svg:height="3.0728in" draw:z-index="24"><draw:image xlink:href="Pictures/10000000000001AA00000106DF3B950E.png" xlink:type="simple" xlink:show="embed" xlink:actuate="onLoad" draw:mime-type="image/png"/></draw:frame><text:span text:style-name="APA_20_Párrafo_20_Car">Sin serifas</text:span><text:bookmark-end text:name="__RefHeading___Toc3715_3540835330"/></text:h>
      <text:list text:style-name="L1">
        <text:list-item>
          <text:p text:style-name="P32"><text:span text:style-name="APA_20_Párrafo_20_Car">Calibri de 11 puntos;</text:span></text:p>
        </text:list-item>
        <text:list-item>
          <text:p text:style-name="P32"><text:span text:style-name="APA_20_Párrafo_20_Car">Arial de 11 puntos;</text:span></text:p>
        </text:list-item>
        <text:list-item>
          <text:p text:style-name="P32"><text:span text:style-name="APA_20_Párrafo_20_Car">o Lucida Sans Unicode de 10 puntos</text:span></text:p>
        </text:list-item>
      </text:list>
      <text:h text:style-name="Heading_20_3" text:outline-level="3"><text:bookmark-start text:name="__RefHeading___Toc3717_3540835330"/><text:span text:style-name="APA_20_Párrafo_20_Car">Con serifas</text:span><text:bookmark-end text:name="__RefHeading___Toc3717_3540835330"/></text:h>
      <text:list text:style-name="L2">
        <text:list-item>
          <text:p text:style-name="P33"><text:span text:style-name="APA_20_Párrafo_20_Car">Times New Roman de 12 puntos;</text:span></text:p>
        </text:list-item>
        <text:list-item>
          <text:p text:style-name="P33"><text:span text:style-name="APA_20_Párrafo_20_Car">Georgia de 11 puntos;</text:span></text:p>
        </text:list-item>
        <text:list-item>
          <text:p text:style-name="P33"><text:span text:style-name="APA_20_Párrafo_20_Car">Computer Modern normal de 10 puntos (la fuente predeterminada en LaTeX)</text:span></text:p>
        </text:list-item>
      </text:list>
      <text:p text:style-name="P28"><text:span text:style-name="APA_20_Párrafo_20_Car">Todas estas fuentes son legibles y están ampliamente disponibles e incluyen caracteres especiales como símbolos matemáticos y letras griegas.</text:span></text:p>
      <text:h text:style-name="Heading_20_2" text:outline-level="2"><text:bookmark-start text:name="__RefHeading___Toc3719_3540835330"/><text:span text:style-name="APA_20_Párrafo_20_Car">Tamaño de fuente</text:span><text:bookmark-end text:name="__RefHeading___Toc3719_3540835330"/></text:h>
      <text:p text:style-name="P28"><text:span text:style-name="APA_20_Párrafo_20_Car">Debes utilizar el mismo tipo y tamaño de fuente en todo el documento, incluso en los títulos y subtítulos, con las siguientes excepciones:</text:span></text:p>
      <text:p text:style-name="P28"><text:span text:style-name="APA_20_Párrafo_20_Car"><text:span text:style-name="T23">figuras</text:span></text:span><text:span text:style-name="APA_20_Párrafo_20_Car">: dentro de las imágenes de figuras, es recomendado utilizar una fuente sin serifa con un tamaño entre 8 y 14 puntos.</text:span></text:p>
      <text:p text:style-name="P28"><text:soft-page-break/><text:span text:style-name="APA_20_Párrafo_20_Car"><text:span text:style-name="T23">código fuente (lenguajes de programación):</text:span></text:span><text:span text:style-name="APA_20_Párrafo_20_Car"> para código fuente, utilice una fuente monoespaciada como la Lucida Console de 10 puntos o Courier New de 10 puntos.</text:span></text:p>
      <text:p text:style-name="P28"><text:span text:style-name="APA_20_Párrafo_20_Car"><text:span text:style-name="T23">notas al pie de página:</text:span></text:span><text:span text:style-name="APA_20_Párrafo_20_Car"> al insertar notas al pie de página puedes utilizar una fuente más pequeña que la fuente del texto (y un interlineado diferente).</text:span></text:p>
      <text:h text:style-name="P34" text:outline-level="1"><text:bookmark-start text:name="_Toc75262145 Copy 1 Copy 1"/><text:bookmark-start text:name="__RefHeading___Toc3721_3540835330"/><text:span text:style-name="APA_20_Párrafo_20_Car">Capítulo </text:span><text:span text:style-name="APA_20_Párrafo_20_Car"><text:span text:style-name="T15">I</text:span></text:span><text:span text:style-name="APA_20_Párrafo_20_Car"><text:span text:style-name="T28">V<text:line-break/></text:span></text:span><text:bookmark-end text:name="_Toc75262145 Copy 1 Copy 1"/><text:span text:style-name="APA_20_Párrafo_20_Car"><text:span text:style-name="T28">Encabezado – Numeración, título abreviado (running head)</text:span></text:span><text:bookmark-end text:name="__RefHeading___Toc3721_3540835330"/></text:h>
      <text:p text:style-name="P28"><text:span text:style-name="APA_20_Párrafo_20_Car">El encabezado es el texto que vemos en el margen superior de cada página del documento. Para los trabajos de los estudiantes, el encabezado de la página consiste únicamente en el número de la página. Para los trabajos profesionales es necesario agregar también el título corto (running head).</text:span></text:p>
      <text:h text:style-name="Heading_20_2" text:outline-level="2"><text:bookmark-start text:name="__RefHeading___Toc3723_3540835330"/><text:span text:style-name="APA_20_Párrafo_20_Car">Portada de estudiantes</text:span><text:bookmark-end text:name="__RefHeading___Toc3723_3540835330"/></text:h>
      <text:p text:style-name="P28"><draw:frame draw:style-name="fr4" draw:name="Image4" text:anchor-type="char" svg:width="5.5925in" svg:height="1.7791in" draw:z-index="25"><draw:image xlink:href="Pictures/1000000000000341000001096235BB69.png" xlink:type="simple" xlink:show="embed" xlink:actuate="onLoad" draw:mime-type="image/png"/></draw:frame><text:span text:style-name="APA_20_Párrafo_20_Car">Ejemplo de encabezado en un trabajo de estudiante</text:span></text:p>
      <text:h text:style-name="Heading_20_2" text:outline-level="2"><text:bookmark-start text:name="__RefHeading___Toc3725_3540835330"/><text:span text:style-name="APA_20_Párrafo_20_Car">Portada profesional</text:span><text:bookmark-end text:name="__RefHeading___Toc3725_3540835330"/></text:h>
      <text:p text:style-name="P28"><draw:frame draw:style-name="fr4" draw:name="Image5" text:anchor-type="char" svg:width="5.5555in" svg:height="1.8673in" draw:z-index="26"><draw:image xlink:href="Pictures/100000000000034100000118FEC90F53.png" xlink:type="simple" xlink:show="embed" xlink:actuate="onLoad" draw:mime-type="image/png"/></draw:frame><text:span text:style-name="APA_20_Párrafo_20_Car"/></text:p>
      <text:p text:style-name="P28"><text:span text:style-name="APA_20_Párrafo_20_Car">Ejemplo de encabezado en un trabajo profesional</text:span></text:p>
      <text:h text:style-name="Heading_20_2" text:outline-level="2"><draw:frame text:anchor-type="paragraph" draw:z-index="38" draw:name="Text Frame 16" draw:style-name="gr10" draw:text-style-name="P35" svg:width="1.4024in" svg:height="0.5776in" svg:x="3.9563in" svg:y="-0.348in"><draw:text-box><text:p><text:span text:style-name="T29">Número de página</text:span></text:p></draw:text-box></draw:frame><text:bookmark-start text:name="__RefHeading___Toc3727_3540835330"/><text:soft-page-break/><text:span text:style-name="APA_20_Párrafo_20_Car">Numeración de páginas</text:span><text:bookmark-end text:name="__RefHeading___Toc3727_3540835330"/></text:h>
      <text:list text:style-name="L3">
        <text:list-item>
          <text:p text:style-name="P36"><draw:line text:anchor-type="paragraph" draw:z-index="37" draw:name="Line 3" draw:style-name="gr11" draw:text-style-name="P25" svg:x1="5.1988in" svg:y1="-0.0256in" svg:x2="5.9382in" svg:y2="-0.765in"><text:p/></draw:line><text:span text:style-name="APA_20_Párrafo_20_Car">Debes utilizar la función de numeración de páginas de Word para insertar números de página.</text:span></text:p>
        </text:list-item>
        <text:list-item>
          <text:p text:style-name="P36"><text:span text:style-name="APA_20_Párrafo_20_Car">La numeración debe estar ubicada en la esquina superior derecha.</text:span></text:p>
        </text:list-item>
        <text:list-item>
          <text:p text:style-name="P36"><text:span text:style-name="APA_20_Párrafo_20_Car">El número de página debe aparecer en todas las páginas y la portada lleva el número de página 1.</text:span></text:p>
        </text:list-item>
      </text:list>
      <text:h text:style-name="Heading_20_2" text:outline-level="2"><text:bookmark-start text:name="__RefHeading___Toc3729_3540835330"/><text:span text:style-name="APA_20_Párrafo_20_Car">Título corto, titulillo (running head)</text:span><text:bookmark-end text:name="__RefHeading___Toc3729_3540835330"/></text:h>
      <text:p text:style-name="P28"><text:span text:style-name="APA_20_Párrafo_20_Car">El título de encabezado, también conocido como titulillo o título abreviado (running head, en inglés) es un título corto de tu investigación que aparece en el encabezado de cada página de un trabajo profesional en formato APA. Es un título breve y sirve para identificar el tema para el lector de una manera rápida.</text:span></text:p>
      <text:p text:style-name="P28"><text:span text:style-name="APA_20_Párrafo_20_Car">Algunas características del título abreviado:</text:span></text:p>
      <text:list text:style-name="L4">
        <text:list-item>
          <text:p text:style-name="P37"><text:span text:style-name="APA_20_Párrafo_20_Car">longitud máxima de 50 caracteres (incluyendo espacios y signos de puntuación). Si el título de tu trabajo tiene más de 50 caracteres debes utilizar una versión resumida del título para el encabezado.</text:span></text:p>
        </text:list-item>
        <text:list-item>
          <text:p text:style-name="P37"><text:span text:style-name="APA_20_Párrafo_20_Car">el título debe estar escrito todo en MAYÚSCULAS</text:span></text:p>
        </text:list-item>
        <text:list-item>
          <text:p text:style-name="P37"><text:span text:style-name="APA_20_Párrafo_20_Car">ya no debes utilizar el término Título corto o Running Head (actualización de laséptima edición de APA)</text:span></text:p>
        </text:list-item>
        <text:list-item>
          <text:p text:style-name="P37"><text:span text:style-name="APA_20_Párrafo_20_Car">el título corto aparece en el mismo formato en todas las páginas de un trabajo profesional, incluida portada.</text:span></text:p>
        </text:list-item>
        <text:list-item>
          <text:p text:style-name="P37"><text:span text:style-name="APA_20_Párrafo_20_Car">debe ser alineado a la izquierda</text:span></text:p>
        </text:list-item>
        <text:list-item>
          <text:p text:style-name="P37"><text:span text:style-name="APA_20_Párrafo_20_Car">en el encabezado también se debe agregar la numeración de página a la derecha</text:span></text:p>
        </text:list-item>
      </text:list>
      <text:p text:style-name="P28"><text:span text:style-name="APA_20_Párrafo_20_Car"><text:span text:style-name="T23">Ejemplo</text:span></text:span></text:p>
      <text:p text:style-name="P28"><text:span text:style-name="APA_20_Párrafo_20_Car"><text:span text:style-name="T23">Título</text:span></text:span></text:p>
      <text:p text:style-name="P28"><text:soft-page-break/><text:span text:style-name="APA_20_Párrafo_20_Car"><text:span text:style-name="T30">Problemas éticos y legales en la práctica profesional de contabilidad en instituciones estatales y privadas en la capital de Colombia</text:span></text:span></text:p>
      <text:p text:style-name="P28"><text:span text:style-name="APA_20_Párrafo_20_Car"><text:span text:style-name="T23">Título corto</text:span></text:span></text:p>
      <text:p text:style-name="P28"><text:span text:style-name="APA_20_Párrafo_20_Car"><text:span text:style-name="T30">LA ÉTICA PROFESIONAL EN LA CONTABILIDAD EN BOGOTÁ</text:span></text:span></text:p>
      <text:p text:style-name="P28"><text:span text:style-name="APA_20_Párrafo_20_Car">Note que el título corto tiene 50 caracteres y es un resumen del título completo del trabajo. El encabezado del trabajo se vería de la siguiente forma en todas las páginas.</text:span></text:p>
      <text:h text:style-name="Heading_20_2" text:outline-level="2"><text:bookmark-start text:name="__RefHeading___Toc3731_3540835330"/><draw:frame draw:style-name="fr4" draw:name="Image6" text:anchor-type="char" svg:width="5.461in" svg:height="1.0035in" draw:z-index="27"><draw:image xlink:href="Pictures/10000000000002D400000085D030964C.png" xlink:type="simple" xlink:show="embed" xlink:actuate="onLoad" draw:mime-type="image/png"/></draw:frame><text:span text:style-name="APA_20_Párrafo_20_Car">Cómo configurar el encabezado en Word</text:span><text:bookmark-end text:name="__RefHeading___Toc3731_3540835330"/></text:h>
      <text:p text:style-name="P28"><text:span text:style-name="APA_20_Párrafo_20_Car">Otro punto importante es cómo realizar esta tarea en Word. Es sólo utilizar la opción de Primera página diferente en la configuración de Diseño y encabezado.</text:span></text:p>
      <text:h text:style-name="P38" text:outline-level="1"><text:bookmark-start text:name="__RefHeading___Toc4727_3540835330"/><text:span text:style-name="APA_20_Párrafo_20_Car">Capítulo V <text:line-break/>Interlineado de Párrafo</text:span><text:bookmark-end text:name="__RefHeading___Toc4727_3540835330"/></text:h>
      <text:p text:style-name="P39"><draw:frame text:anchor-type="paragraph" draw:z-index="40" draw:name="Text Frame 18" draw:style-name="gr12" draw:text-style-name="P35" svg:width="3.3087in" svg:height="0.513in" svg:x="2.3791in" svg:y="0.0902in"><draw:text-box><text:p><text:span text:style-name="T29">¡No saltos de línea antes del párrafo!</text:span></text:p></draw:text-box></draw:frame><text:span text:style-name="APA_20_Párrafo_20_Car"/></text:p>
      <text:p text:style-name="P28"><draw:line text:anchor-type="paragraph" draw:z-index="42" draw:name="Line 5" draw:style-name="gr13" draw:text-style-name="P25" svg:x1="0.9748in" svg:y1="-0.1894in" svg:x2="2.2004in" svg:y2="-0.1894in"><text:p/></draw:line><text:span text:style-name="APA_20_Párrafo_20_Car">Como regla general siempre utilizaremos interlineado doble, incluyendo el resumen, texto de citas de más de 40 palabras, números de tablas y figuras, títulos y subtítulos y en la lista de referencias. No debes agregar un espacio adicional de párrafo antes o después de los párrafos. Tampoco debes realizar saltos de línea extras entre párrafos o entre títulos y subtítulos.</text:span></text:p>
      <text:p text:style-name="P28"><draw:frame text:anchor-type="paragraph" draw:z-index="39" draw:name="Text Frame 17" draw:style-name="gr12" draw:text-style-name="P35" svg:width="3.3087in" svg:height="0.513in" svg:x="2.4346in" svg:y="-0.0307in"><draw:text-box><text:p><text:span text:style-name="T29">¡No saltos de línea después del párrafo!</text:span></text:p></draw:text-box></draw:frame><draw:line text:anchor-type="paragraph" draw:z-index="41" draw:name="Line 4" draw:style-name="gr13" draw:text-style-name="P25" svg:x1="0.9748in" svg:y1="0.0732in" svg:x2="2.2004in" svg:y2="0.0732in"><text:p/></draw:line></text:p>
      <text:h text:style-name="Heading_20_2" text:outline-level="2"><text:bookmark-start text:name="__RefHeading___Toc4729_3540835330"/><text:span text:style-name="APA_20_Párrafo_20_Car">Excepciones</text:span><text:bookmark-end text:name="__RefHeading___Toc4729_3540835330"/></text:h>
      <text:p text:style-name="P28"><text:span text:style-name="APA_20_Párrafo_20_Car">Las excepciones al doble espacio (o al salto adicional de párrafo) entre líneas son las siguientes:</text:span></text:p>
      <text:p text:style-name="P28"><text:soft-page-break/><text:span text:style-name="APA_20_Párrafo_20_Car"><text:span text:style-name="T23">Portada</text:span></text:span><text:span text:style-name="APA_20_Párrafo_20_Car">: inserte una línea extra en blanco a doble espacio entre el título de la investigación y los datos del autor en la portada. Cuando agregues la nota del autor, incluya también al menos una línea en blanco extra a doble espacio antes de la nota del autor.</text:span></text:p>
      <text:p text:style-name="P28"><text:span text:style-name="APA_20_Párrafo_20_Car"><text:span text:style-name="T23">Tablas</text:span></text:span><text:span text:style-name="APA_20_Párrafo_20_Car">: en el cuerpo de la tabla puede utilizar interlineado sencillo, 1,5 o doble. Elija el que sea más efectivo para tu trabajo. Sin embargo, sigas utilizando doble espacio en el número de la tabla, título y notas.</text:span></text:p>
      <text:p text:style-name="P28"><text:span text:style-name="APA_20_Párrafo_20_Car"><text:span text:style-name="T23">Figuras</text:span></text:span><text:span text:style-name="APA_20_Párrafo_20_Car">: el texto dentro de una imagen o de una figura pueden ser interlineado sencillo, 1,5 o doble. Elija el que sea más efectivo para la información que quieras mostrar. Al igual que en las tablas, utilices interlineado doble en el número de figura, título y notas.</text:span></text:p>
      <text:p text:style-name="P28"><text:span text:style-name="APA_20_Párrafo_20_Car"><text:span text:style-name="T23">Notas al pie de página:</text:span></text:span><text:span text:style-name="APA_20_Párrafo_20_Car"> Puedes utilizar intelineado sencillo y una fuente ligeramente más pequeña que el texto. Por ejemplo, si utilizas Times New Roman, 12 en el texto, en las notas al pie de página, podrás utilizar Times New Roman, 10.</text:span></text:p>
      <text:p text:style-name="P28"><text:span text:style-name="APA_20_Párrafo_20_Car"><text:span text:style-name="T23">Ecuaciones matemáticas:</text:span></text:span><text:span text:style-name="APA_20_Párrafo_20_Car"> en estos casos es permitido aplicar un interlineado triple o cuádruple. Ajuste al valor que deje la ecuación visible.</text:span></text:p>
      <table:table table:name="Table1" table:style-name="Table1" table:template-name="Academic">
        <table:table-column table:style-name="Table1.A" table:number-columns-repeated="3"/>
        <table:table-row table:style-name="Table1.1">
          <table:table-cell table:style-name="Table1.A1" office:value-type="string">
            <text:p text:style-name="P40">Elemento</text:p>
          </table:table-cell>
          <table:table-cell table:style-name="Table1.A1" office:value-type="string">
            <text:p text:style-name="P40">Interlineado</text:p>
          </table:table-cell>
          <table:table-cell table:style-name="Table1.A1" office:value-type="string">
            <text:p text:style-name="P40">Observación</text:p>
          </table:table-cell>
        </table:table-row>
        <table:table-row table:style-name="Table1.1">
          <table:table-cell table:style-name="Table1.A2" office:value-type="string">
            <text:p text:style-name="P41">Página de Título</text:p>
          </table:table-cell>
          <table:table-cell table:style-name="Table1.A2" office:value-type="string">
            <text:p text:style-name="P41">Doble</text:p>
          </table:table-cell>
          <table:table-cell table:style-name="Table1.C2">
            <text:p text:style-name="P41"/>
          </table:table-cell>
        </table:table-row>
        <table:table-row table:style-name="Table1.1">
          <table:table-cell table:style-name="Table1.A2" office:value-type="string">
            <text:p text:style-name="P41">Resumen</text:p>
          </table:table-cell>
          <table:table-cell table:style-name="Table1.A2" office:value-type="string">
            <text:p text:style-name="P42">Doble</text:p>
          </table:table-cell>
          <table:table-cell table:style-name="Table1.C2">
            <text:p text:style-name="P41"/>
          </table:table-cell>
        </table:table-row>
        <table:table-row table:style-name="Table1.1">
          <table:table-cell table:style-name="Table1.A2" office:value-type="string">
            <text:p text:style-name="P41">Texto</text:p>
          </table:table-cell>
          <table:table-cell table:style-name="Table1.A2" office:value-type="string">
            <text:p text:style-name="P42">Doble</text:p>
          </table:table-cell>
          <table:table-cell table:style-name="Table1.C2">
            <text:p text:style-name="P41"/>
          </table:table-cell>
        </table:table-row>
        <table:table-row table:style-name="Table1.1">
          <table:table-cell table:style-name="Table1.A2" office:value-type="string">
            <text:p text:style-name="P41">Pie de página</text:p>
          </table:table-cell>
          <table:table-cell table:style-name="Table1.A2" office:value-type="string">
            <text:p text:style-name="P41">Sencillo</text:p>
          </table:table-cell>
          <table:table-cell table:style-name="Table1.C2">
            <text:p text:style-name="P41"/>
          </table:table-cell>
        </table:table-row>
        <table:table-row table:style-name="Table1.1">
          <table:table-cell table:style-name="Table1.A2" office:value-type="string">
            <text:p text:style-name="P41">Referencias</text:p>
          </table:table-cell>
          <table:table-cell table:style-name="Table1.A2" office:value-type="string">
            <text:p text:style-name="P41">Doble</text:p>
          </table:table-cell>
          <table:table-cell table:style-name="Table1.A2" office:value-type="string">
            <text:p text:style-name="P41">Utiliza el espaciado doble en las referencias y entre referencias</text:p>
          </table:table-cell>
        </table:table-row>
        <table:table-row table:style-name="Table1.1">
          <table:table-cell table:style-name="Table1.A2" office:value-type="string">
            <text:p text:style-name="P41">Cuerpo de una tablas</text:p>
          </table:table-cell>
          <table:table-cell table:style-name="Table1.A2" office:value-type="string">
            <text:p text:style-name="P41">Sencilo, 1.5 o doble</text:p>
          </table:table-cell>
          <table:table-cell table:style-name="Table1.A2" office:value-type="string">
            <text:p text:style-name="P41">El interlineado de párrafo en una tabla puede ser ajustado a cualquiera de estos valores de modo que elijas la mejor presentación para tus datos.</text:p>
          </table:table-cell>
        </table:table-row>
        <table:table-row table:style-name="Table1.1">
          <table:table-cell table:style-name="Table1.A2" office:value-type="string">
            <text:p text:style-name="P41">Título de la página, numeración y observación</text:p>
          </table:table-cell>
          <table:table-cell table:style-name="Table1.A2" office:value-type="string">
            <text:p text:style-name="P41">Doble</text:p>
          </table:table-cell>
          <table:table-cell table:style-name="Table1.A2" office:value-type="string">
            <text:p text:style-name="P41">El interlineado de párrafo de cualquier texto en una imagen debe ser ajustado para la mejor presentación posible</text:p>
          </table:table-cell>
        </table:table-row>
        <table:table-row table:style-name="Table1.1">
          <table:table-cell table:style-name="Table1.A2" office:value-type="string">
            <text:p text:style-name="P41">Figura (cualquier texto en la imagen)</text:p>
          </table:table-cell>
          <table:table-cell table:style-name="Table1.A2" office:value-type="string">
            <text:p text:style-name="P41">Sencilo, 1.5 o doble</text:p>
          </table:table-cell>
          <table:table-cell table:style-name="Table1.C2">
            <text:p text:style-name="P41"/>
          </table:table-cell>
        </table:table-row>
        <table:table-row table:style-name="Table1.1">
          <table:table-cell table:style-name="Table1.A2" office:value-type="string">
            <text:p text:style-name="P41">Subtítulo de figura</text:p>
          </table:table-cell>
          <table:table-cell table:style-name="Table1.A2" office:value-type="string">
            <text:p text:style-name="P41">Doble</text:p>
          </table:table-cell>
          <table:table-cell table:style-name="Table1.A2" office:value-type="string">
            <text:p text:style-name="P41">El interlineado del subtítulo de la imagen debe ser doble</text:p>
          </table:table-cell>
        </table:table-row>
        <table:table-row table:style-name="Table1.1">
          <table:table-cell table:style-name="Table1.A2" office:value-type="string">
            <text:p text:style-name="P41">Apendices</text:p>
          </table:table-cell>
          <table:table-cell table:style-name="Table1.A2" office:value-type="string">
            <text:p text:style-name="P41">Doble</text:p>
          </table:table-cell>
          <table:table-cell table:style-name="Table1.A2" office:value-type="string">
            <text:p text:style-name="P41"/>
          </table:table-cell>
        </table:table-row>
        <table:table-row table:style-name="Table1.1">
          <table:table-cell table:style-name="Table1.A12" office:value-type="string">
            <text:p text:style-name="P41">Ecuaciones</text:p>
          </table:table-cell>
          <table:table-cell table:style-name="Table1.B12" office:value-type="string">
            <text:p text:style-name="P41">Triple o cuádruple</text:p>
          </table:table-cell>
          <table:table-cell table:style-name="Table1.C12">
            <text:p text:style-name="P41"/>
          </table:table-cell>
        </table:table-row>
      </table:table>
      <text:p text:style-name="P28"><text:span text:style-name="APA_20_Párrafo_20_Car"/></text:p>
      <text:h text:style-name="Heading_20_2" text:outline-level="2"><text:bookmark-start text:name="__RefHeading___Toc4731_3540835330"/><text:soft-page-break/><text:span text:style-name="APA_20_Párrafo_20_Car">¿Cuándo agregar una línea extra entre párrafo?</text:span><text:bookmark-end text:name="__RefHeading___Toc4731_3540835330"/></text:h>
      <text:p text:style-name="P28"><text:span text:style-name="APA_20_Párrafo_20_Car">Como regla general, no debes agregar líneas en blanco adicionales entre los párrafos. Una excepción es alrededor de las ecuaciones, tabla o figuras, donde puedes agregar una o dos líneas en blanco antes y/o después del elemento para que sea más visible para el lector.</text:span></text:p>
      <text:p text:style-name="P28"><text:span text:style-name="APA_20_Párrafo_20_Car">Por lo general, no es necesario agregar líneas para evitar los títulos viudos o huérfanos (aunque sugerimos que revises esta información junto a la institución académica dónde vayas a presentar el documento).</text:span></text:p>
      <text:h text:style-name="P43" text:outline-level="1"><text:bookmark-start text:name="__RefHeading___Toc4733_3540835330"/><text:span text:style-name="APA_20_Párrafo_20_Car">Capítulo V</text:span><text:span text:style-name="APA_20_Párrafo_20_Car"><text:span text:style-name="T31">I</text:span></text:span><text:span text:style-name="APA_20_Párrafo_20_Car"> <text:line-break/>Alineación y Sangría de Párrafo</text:span><text:bookmark-end text:name="__RefHeading___Toc4733_3540835330"/></text:h>
      <text:p text:style-name="P28"><draw:line text:anchor-type="paragraph" draw:z-index="43" draw:name="Line 6" draw:style-name="gr13" draw:text-style-name="P25" svg:x1="5.7146in" svg:y1="2.1866in" svg:x2="6.3248in" svg:y2="1.5764in"><text:p/></draw:line><draw:frame text:anchor-type="paragraph" draw:z-index="44" draw:name="Text Frame 19" draw:style-name="gr14" draw:text-style-name="P35" svg:width="1.6835in" svg:height="0.4488in" svg:x="5.0055in" svg:y="1.2866in"><draw:text-box><text:p><text:span text:style-name="T29">Alineación a la izquierda</text:span></text:p></draw:text-box></draw:frame>La recomendación APA es que la longitud de cada línea del texto debe ser de máximo de 6½ pulgadas, es decir 16.51 cm (si haces las cuentas es el ancho del tamaño de página en formato carta menos el tamaño de los márgenes de mínimo 1 pulgada, es decir 2.54 cm, de cada lado).</text:p>
      <text:h text:style-name="Heading_20_2" text:outline-level="2"><text:bookmark-start text:name="__RefHeading___Toc4735_3540835330"/>Alineación de párrafo<text:bookmark-end text:name="__RefHeading___Toc4735_3540835330"/></text:h>
      <text:p text:style-name="P44">Utilices alineación a la izquierda en todo el documento. Es decir, el margen derecho quedará “irregular”. No utilices justificación de texto, al menos que tu universidad te solicite lo contrario.</text:p>
      <text:h text:style-name="Heading_20_2" text:outline-level="2"><text:bookmark-start text:name="__RefHeading___Toc4737_3540835330"/>Separación de sílabas<text:bookmark-end text:name="__RefHeading___Toc4737_3540835330"/></text:h>
      <text:p text:style-name="P28">No inserte guiones automáticos, ni saltos manuales en tu investigación. Es aceptable separar enlaces largos (como en un DOI o URL en una entrada de la lista de referencias, pero asegúrate que los enlaces queden funcionando).</text:p>
      <text:h text:style-name="Heading_20_2" text:outline-level="2"><text:bookmark-start text:name="__RefHeading___Toc4739_3540835330"/>Sangría de párrafo<text:bookmark-end text:name="__RefHeading___Toc4739_3540835330"/></text:h>
      <text:p text:style-name="P28"><draw:line text:anchor-type="paragraph" draw:z-index="45" draw:name="Line 11" draw:style-name="gr15" draw:text-style-name="P29" svg:x1="-0.0024in" svg:y1="0.1476in" svg:x2="0.439in" svg:y2="0.1476in"><text:p/></draw:line><draw:frame text:anchor-type="paragraph" draw:z-index="46" draw:name="Text Frame 24" draw:style-name="gr16" draw:text-style-name="P35" svg:width="1.1122in" svg:height="0.3843in" svg:x="-1.2925in" svg:y="0.0382in"><draw:text-box><text:p text:style-name="P45"><text:span text:style-name="T29">Sangría1.27cm</text:span></text:p></draw:text-box></draw:frame><draw:custom-shape text:anchor-type="paragraph" draw:z-index="47" draw:name="Shape 1" draw:style-name="gr17" draw:text-style-name="P46" svg:width="0.0488in" svg:height="0.9461in" svg:x="-0.1035in" svg:y="0.3516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range-y-minimum="0" draw:handle-range-y-maximum="5400" draw:handle-position="10800 $0" draw:handle-position-x="10800" draw:handle-position-y="$0"/><draw:handle draw:handle-range-y-minimum="0" draw:handle-range-y-maximum="21600" draw:handle-position="left $1" draw:handle-position-x="left" draw:handle-position-y="$1"/></draw:enhanced-geometry></draw:custom-shape><draw:frame text:anchor-type="paragraph" draw:z-index="48" draw:name="Text Frame 25" draw:style-name="gr16" draw:text-style-name="P47" svg:width="1.1122in" svg:height="0.3843in" svg:x="-1.3083in" svg:y="0.6547in"><draw:text-box><text:p text:style-name="P45"><text:span text:style-name="T29">Interlineado doble</text:span></text:p></draw:text-box></draw:frame>La primera línea de cada párrafo del texto debe tener un sangrado de ½ pulg. (1,27 cm) desde el margen izquierdo. Puedes utilizar la tecla Tab o, idealmente, configurar el <text:soft-page-break/>estilo de párrafos de en Word para lograr la sangría. Jamás utilices la barra de espacios para conseguir este efecto.</text:p>
      <text:h text:style-name="Heading_20_2" text:outline-level="2"><text:bookmark-start text:name="__RefHeading___Toc4741_3540835330"/>Excepciones de alineado y sangría de parráfo<text:bookmark-end text:name="__RefHeading___Toc4741_3540835330"/></text:h>
      <text:list text:style-name="L5">
        <text:list-item>
          <text:p text:style-name="P48"><text:span text:style-name="T23">portada</text:span>: el título y las afiliaciones deben estar centrados.</text:p>
        </text:list-item>
        <text:list-item>
          <text:p text:style-name="P48"><text:span text:style-name="T23">títulos y subtítulos:</text:span> algunos níveles de títulos y subtítulos tienen alineación diferente. El título de nivel 1 debe estar centrado, los subtítulos de nivel 2 y 3 deben estar alineados a la izquierda (sin sangrado) y los títulos de los niveles 4 y 5 están sangrados como los párrafos regulares.</text:p>
        </text:list-item>
        <text:list-item>
          <text:p text:style-name="P48"><text:span text:style-name="T23">secciones del documento:</text:span> Los títulos de las secciones (Resumen, Referencias, Apendice, Tablas, Figuras) deben estar centrados.</text:p>
        </text:list-item>
        <text:list-item>
          <text:p text:style-name="P48"><text:span text:style-name="T23">resumen/abstract:</text:span> la primera línea del primer parráfo del resumen debe quedar sin sangría.</text:p>
        </text:list-item>
        <text:list-item>
          <text:p text:style-name="P48"><text:span text:style-name="T23">citas en bloque: </text:span>las citas en bloque (citas con más de 40 palabras), deben utilizar una sangría de ½ pulg. (1,27 cm) desde el margen izquierdo. Si la cita en bloque tiene más de un párrafo, la primera línea del segundo parráfo, así como los párrafos posteriores deben sangrarse más ½ pulg. (1,27 cm). De modo que la primera línea tengan una sangría total de 1 pulg. (2.54 cm).</text:p>
        </text:list-item>
        <text:list-item>
          <text:p text:style-name="P48"><text:span text:style-name="T23">tablas y figuras:</text:span> los números de tabla y figura, los títulos de tablas y figuras así como las notas deben quedar alineados a la izquierda (sin sangría).</text:p>
        </text:list-item>
        <text:list-item>
          <text:p text:style-name="P48"><text:span text:style-name="T23">lista de referencias: </text:span>las entradas de la lista de referencias bibliográficas deben tener una sangría francesa de ½ pulg. (1,27 cm).</text:p>
        </text:list-item>
        <text:list-item>
          <text:p text:style-name="P48"><text:span text:style-name="T23">apéndice: </text:span>las etiquetas y títulos de los apéndices deben estar centrados.</text:p>
        </text:list-item>
      </text:list>
      <text:h text:style-name="P49" text:outline-level="1"><text:bookmark-start text:name="__RefHeading___Toc3733_3540835330"/><text:bookmark-start text:name="_Toc75262145 Copy 1"/>Capítulo <text:span text:style-name="T28">V</text:span><text:span text:style-name="T31">II</text:span><text:span text:style-name="T28"><text:line-break/></text:span>Títulos y Subtítulos<text:bookmark-end text:name="__RefHeading___Toc3733_3540835330"/><text:bookmark-end text:name="_Toc75262145 Copy 1"/></text:h>
      <text:p text:style-name="P50">Nivel 1 <text:span text:style-name="T23">Centrado • Negrita • Cada Palabra Iniciando en Mayúscula</text:span></text:p>
      <text:p text:style-name="APA_20_Párrafo"><text:soft-page-break/>Texto inicia en nuevo párrafo</text:p>
      <text:h text:style-name="P51" text:outline-level="2"><text:bookmark-start text:name="_Toc75262146 Copy 1"/><text:bookmark-start text:name="__RefHeading___Toc3735_3540835330"/>Tí<text:span text:style-name="T32">t</text:span>ulo Nivel 2<text:bookmark-end text:name="_Toc75262146 Copy 1"/><text:bookmark-end text:name="__RefHeading___Toc3735_3540835330"/></text:h>
      <text:p text:style-name="P52">Nivel 2 Alineado a la izquierda • Negrita • Cada Palabra Iniciando en Mayúscula</text:p>
      <text:p text:style-name="P53">Texto inicia en nuevo párrafo</text:p>
      <text:h text:style-name="P54" text:outline-level="3"><text:bookmark-start text:name="_Toc75262147 Copy 1"/><text:bookmark-start text:name="__RefHeading___Toc3737_3540835330"/>Título Nivel 3<text:bookmark-end text:name="_Toc75262147 Copy 1"/><text:bookmark-end text:name="__RefHeading___Toc3737_3540835330"/></text:h>
      <text:p text:style-name="P55">Nivel 3 Alineado a la izquierda • Negrita • Cursiva • Cada Palabra Iniciando en Mayúscula</text:p>
      <text:p text:style-name="P53">Texto inicia en nuevo párrafo</text:p>
      <text:h text:style-name="P56" text:outline-level="4">Título <text:span text:style-name="T33">N</text:span>ivel 4</text:h>
      <text:p text:style-name="APA_20_Párrafo"><text:span text:style-name="T23">Nivel 4 Alineado a la izquierda • Negrita • Cada Palabra Iniciando en Mayúscula • Con sangría de ½ pulgada (1.27 cm) • Con punto final. </text:span>Texto inicia en la misma línea</text:p>
      <text:h text:style-name="P57" text:outline-level="5">Título <text:span text:style-name="T33">N</text:span>ivel 5<text:span text:style-name="T30">.</text:span></text:h>
      <text:p text:style-name="APA_20_Párrafo"><text:span text:style-name="APA_20_Párrafo_20_Car"><text:span text:style-name="T34">Nivel 5 Alineado a la izquierda • Negrita • Cursiva • Cada Palabra Iniciando en Mayúscula • Con sangría de ½ pulgada (1.27 cm) </text:span></text:span><text:span text:style-name="APA_20_Párrafo_20_Car"><text:span text:style-name="T35">•</text:span></text:span><text:span text:style-name="APA_20_Párrafo_20_Car"><text:span text:style-name="T34"> Con punto final. </text:span></text:span><text:span text:style-name="APA_20_Párrafo_20_Car">Texto inicia en la misma línea</text:span></text:p>
      <text:p text:style-name="P58"><text:span text:style-name="APA_20_Párrafo_20_Car">Debes utilizar los niveles de títulos consecutivamente. Si tu documento cuenta con hasta tres niveles de títulos, entonces debes utilizar los tres primeros estilos de encabezados mostrados en la tabla anterior.</text:span></text:p>
      <text:p text:style-name="P58"><text:span text:style-name="APA_20_Párrafo_20_Car"><text:span text:style-name="T23">Atención</text:span></text:span></text:p>
      <text:list text:style-name="L6">
        <text:list-item>
          <text:p text:style-name="P59"><text:span text:style-name="APA_20_Párrafo_20_Car">Evite tener solo un subtítulo debajo de un nivel;</text:span></text:p>
        </text:list-item>
        <text:list-item>
          <text:p text:style-name="P59"><text:span text:style-name="APA_20_Párrafo_20_Car"><text:span text:style-name="T30">No etiquete los títulos y subtítulos con números o letras;</text:span></text:span></text:p>
        </text:list-item>
        <text:list-item>
          <text:p text:style-name="P59"><text:span text:style-name="APA_20_Párrafo_20_Car">Los títulos y subtítulos deben tener interlineado doble;.</text:span></text:p>
        </text:list-item>
        <text:list-item>
          <text:p text:style-name="P59"><text:soft-page-break/><text:span text:style-name="APA_20_Párrafo_20_Car">No agregue líneas en blanco encima o debajo de los títulos o subtítulos, incluso si cae al final de una página;</text:span></text:p>
        </text:list-item>
      </text:list>
      <text:h text:style-name="Heading_20_2" text:outline-level="2"><text:bookmark-start text:name="__RefHeading___Toc4743_3540835330"/><text:span text:style-name="APA_20_Párrafo_20_Car">Título en la Introducción</text:span><text:bookmark-end text:name="__RefHeading___Toc4743_3540835330"/></text:h>
      <text:p text:style-name="P28"><text:span text:style-name="APA_20_Párrafo_20_Car">Bajo la estructura de un documento APA, los primeros párrafos del documento se entienden como introductorios y por eso no se utiliza el título literal “Introducción”. Es decir, no comiences un trabajo con un título de “Introducción”. El título de tu trabajo en la parte superior de la sección Introducción actúa como un encabezado de Nivel 1.</text:span></text:p>
      <text:p text:style-name="P28"><text:span text:style-name="APA_20_Párrafo_20_Car">Es posible (pero no es obligatorio) usar subtítulos dentro de la introducción. Después de la introducción (independientemente de si incluye subtítulos o no), use un título de Nivel 1 para la siguiente sección principal del documento (por ejemplo, Método).</text:span></text:p>
      <text:h text:style-name="Heading_20_1" text:outline-level="1"><text:bookmark-start text:name="_Toc75262148"/><text:bookmark-start text:name="__RefHeading___Toc3739_3540835330"/>Capítulo <text:bookmark-end text:name="_Toc75262148"/><text:span text:style-name="T31">VIII</text:span><text:bookmark-end text:name="__RefHeading___Toc3739_3540835330"/></text:h>
      <text:h text:style-name="P60" text:outline-level="2"><text:bookmark-start text:name="_Toc75262149"/><text:bookmark-start text:name="__RefHeading___Toc3741_3540835330"/>Título nivel 2<text:bookmark-end text:name="_Toc75262149"/><text:bookmark-end text:name="__RefHeading___Toc3741_3540835330"/></text:h>
      <text:h text:style-name="Heading_20_3" text:outline-level="3"><text:bookmark-start text:name="_Toc75262150"/><text:bookmark-start text:name="__RefHeading___Toc3743_3540835330"/>Título nivel 3<text:bookmark-end text:name="_Toc75262150"/><text:bookmark-end text:name="__RefHeading___Toc3743_3540835330"/></text:h>
      <text:h text:style-name="Heading_20_4" text:outline-level="4">Título nivel 4</text:h>
      <text:h text:style-name="Heading_20_5" text:outline-level="5">Título nivel 5</text:h>
      <text:p text:style-name="Standard"/>
      <text:p text:style-name="Standard"/>
      <text:h text:style-name="P61" text:outline-level="1"><text:bookmark-start text:name="_Toc75262151"/><text:bookmark-start text:name="__RefHeading___Toc3745_3540835330"/>Capítulo I<text:span text:style-name="T36">X</text:span><text:line-break/>Tablas y Figuras<text:bookmark-end text:name="_Toc75262151"/><text:bookmark-end text:name="__RefHeading___Toc3745_3540835330"/></text:h>
      <text:h text:style-name="P60" text:outline-level="2"><text:bookmark-start text:name="_Toc75262152"/><text:bookmark-start text:name="__RefHeading___Toc3747_3540835330"/>Tablas APA 7ma edición<text:bookmark-end text:name="_Toc75262152"/><text:bookmark-end text:name="__RefHeading___Toc3747_3540835330"/></text:h>
      <text:p text:style-name="APA_20_Párrafo">Si de originalidad se trata, las normas APA tienen un doctorado. Es por eso que se han mantenido vigentes con el pasar de los años y es un <text:span text:style-name="Strong_20_Emphasis"><text:span text:style-name="T37">criterio casi obligatorio</text:span></text:span> a la hora de redactar un informe, documento, artículo, etc. de carácter científico.</text:p>
      <text:p text:style-name="TITULO._20_Tablas_20_y_20_Figuras"><text:bookmark-start text:name="_Toc35446746"/><text:span text:style-name="T38">Tabla </text:span><text:span text:style-name="T38"><text:sequence text:ref-name="refTable0" text:name="Table" text:formula="ooow:Table+1" style:num-format="1">1</text:sequence></text:span><text:line-break/>El título debe ser claro y descriptivo.<text:bookmark-end text:name="_Toc35446746"/></text:p>
      <table:table table:name="Tabla1" table:style-name="Tabla1">
        <table:table-column table:style-name="Tabla1.A"/>
        <table:table-column table:style-name="Tabla1.B"/>
        <table:table-column table:style-name="Tabla1.C"/>
        <table:table-column table:style-name="Tabla1.A"/>
        <table:table-column table:style-name="Tabla1.B"/>
        <table:table-column table:style-name="Tabla1.C"/>
        <table:table-row table:style-name="Tabla1.1">
          <table:table-cell table:style-name="Tabla1.A1" office:value-type="string">
            <text:p text:style-name="P62" loext:marker-style-name="T39"><text:span text:style-name="T39">variables</text:span><text:span text:style-name="T39"/></text:p>
          </table:table-cell>
          <table:table-cell table:style-name="Tabla1.A1" office:value-type="string">
            <text:p text:style-name="P63" loext:marker-style-name="T39"><text:span text:style-name="T39">categoría </text:span><text:span text:style-name="T39"/></text:p>
          </table:table-cell>
          <table:table-cell table:style-name="Tabla1.A1" office:value-type="string">
            <text:p text:style-name="P63" loext:marker-style-name="T39"><text:span text:style-name="T39">categoría </text:span><text:span text:style-name="T39"/></text:p>
          </table:table-cell>
          <table:table-cell table:style-name="Tabla1.A1" office:value-type="string">
            <text:p text:style-name="P63" loext:marker-style-name="T39"><text:span text:style-name="T39">categoría </text:span><text:span text:style-name="T39"/></text:p>
          </table:table-cell>
          <table:table-cell table:style-name="Tabla1.A1" office:value-type="string">
            <text:p text:style-name="P63" loext:marker-style-name="T39"><text:span text:style-name="T39">categoría </text:span><text:span text:style-name="T39"/></text:p>
          </table:table-cell>
          <table:table-cell table:style-name="Tabla1.A1" office:value-type="string">
            <text:p text:style-name="P63" loext:marker-style-name="T39"><text:span text:style-name="T39">categoría </text:span><text:span text:style-name="T39"/></text:p>
          </table:table-cell>
        </table:table-row>
        <table:table-row table:style-name="Tabla1.1">
          <table:table-cell table:style-name="Tabla1.A2" office:value-type="string">
            <text:p text:style-name="P62" loext:marker-style-name="T40"><text:span text:style-name="T40">Variable 1</text:span><text:span text:style-name="T40"/></text:p>
          </table:table-cell>
          <table:table-cell table:style-name="Tabla1.A2" office:value-type="string">
            <text:p text:style-name="P63" loext:marker-style-name="T40"><text:span text:style-name="T40">xx</text:span><text:span text:style-name="T40"/></text:p>
          </table:table-cell>
          <table:table-cell table:style-name="Tabla1.A2" office:value-type="string">
            <text:p text:style-name="P63" loext:marker-style-name="T40"><text:span text:style-name="T40">xx</text:span><text:span text:style-name="T40"/></text:p>
          </table:table-cell>
          <table:table-cell table:style-name="Tabla1.A2" office:value-type="string">
            <text:p text:style-name="P63" loext:marker-style-name="T40"><text:span text:style-name="T40">xx</text:span><text:span text:style-name="T40"/></text:p>
          </table:table-cell>
          <table:table-cell table:style-name="Tabla1.A2" office:value-type="string">
            <text:p text:style-name="P63" loext:marker-style-name="T40"><text:span text:style-name="T40">xx</text:span><text:span text:style-name="T40"/></text:p>
          </table:table-cell>
          <table:table-cell table:style-name="Tabla1.A2" office:value-type="string">
            <text:p text:style-name="P63" loext:marker-style-name="T40"><text:span text:style-name="T40">xx</text:span><text:span text:style-name="T40"/></text:p>
          </table:table-cell>
        </table:table-row>
        <table:table-row table:style-name="Tabla1.1">
          <table:table-cell table:style-name="Tabla1.A2" office:value-type="string">
            <text:p text:style-name="P62" loext:marker-style-name="T40"><text:span text:style-name="T40">Variable 2</text:span><text:span text:style-name="T40"/></text:p>
          </table:table-cell>
          <table:table-cell table:style-name="Tabla1.A2" office:value-type="string">
            <text:p text:style-name="P63" loext:marker-style-name="T40"><text:span text:style-name="T40">xx</text:span><text:span text:style-name="T40"/></text:p>
          </table:table-cell>
          <table:table-cell table:style-name="Tabla1.A2" office:value-type="string">
            <text:p text:style-name="P63" loext:marker-style-name="T40"><text:span text:style-name="T40">xx</text:span><text:span text:style-name="T40"/></text:p>
          </table:table-cell>
          <table:table-cell table:style-name="Tabla1.A2" office:value-type="string">
            <text:p text:style-name="P63" loext:marker-style-name="T40"><text:span text:style-name="T40">xx</text:span><text:span text:style-name="T40"/></text:p>
          </table:table-cell>
          <table:table-cell table:style-name="Tabla1.A2" office:value-type="string">
            <text:p text:style-name="P63" loext:marker-style-name="T40"><text:span text:style-name="T40">xx</text:span><text:span text:style-name="T40"/></text:p>
          </table:table-cell>
          <table:table-cell table:style-name="Tabla1.A2" office:value-type="string">
            <text:p text:style-name="P63" loext:marker-style-name="T40"><text:span text:style-name="T40">xx</text:span><text:span text:style-name="T40"/></text:p>
          </table:table-cell>
        </table:table-row>
        <table:table-row table:style-name="Tabla1.1">
          <table:table-cell table:style-name="Tabla1.A2" office:value-type="string">
            <text:p text:style-name="P62" loext:marker-style-name="T40"><text:span text:style-name="T40">Variable 3</text:span><text:span text:style-name="T40"/></text:p>
          </table:table-cell>
          <table:table-cell table:style-name="Tabla1.A2" office:value-type="string">
            <text:p text:style-name="P63" loext:marker-style-name="T40"><text:span text:style-name="T40">xx</text:span><text:span text:style-name="T40"/></text:p>
          </table:table-cell>
          <table:table-cell table:style-name="Tabla1.A2" office:value-type="string">
            <text:p text:style-name="P63" loext:marker-style-name="T40"><text:span text:style-name="T40">xx</text:span><text:span text:style-name="T40"/></text:p>
          </table:table-cell>
          <table:table-cell table:style-name="Tabla1.A2" office:value-type="string">
            <text:p text:style-name="P63" loext:marker-style-name="T40"><text:span text:style-name="T40">xx</text:span><text:span text:style-name="T40"/></text:p>
          </table:table-cell>
          <table:table-cell table:style-name="Tabla1.A2" office:value-type="string">
            <text:p text:style-name="P63" loext:marker-style-name="T40"><text:span text:style-name="T40">xx</text:span><text:span text:style-name="T40"/></text:p>
          </table:table-cell>
          <table:table-cell table:style-name="Tabla1.A2" office:value-type="string">
            <text:p text:style-name="P63" loext:marker-style-name="T40"><text:span text:style-name="T40">xx</text:span><text:span text:style-name="T40"/></text:p>
          </table:table-cell>
        </table:table-row>
        <table:table-row table:style-name="Tabla1.1">
          <table:table-cell table:style-name="Tabla1.A2" office:value-type="string">
            <text:p text:style-name="P62" loext:marker-style-name="T40"><text:span text:style-name="T40">Variable 4</text:span><text:span text:style-name="T40"/></text:p>
          </table:table-cell>
          <table:table-cell table:style-name="Tabla1.A2" office:value-type="string">
            <text:p text:style-name="P63" loext:marker-style-name="T40"><text:span text:style-name="T40">xx</text:span><text:span text:style-name="T40"/></text:p>
          </table:table-cell>
          <table:table-cell table:style-name="Tabla1.A2" office:value-type="string">
            <text:p text:style-name="P63" loext:marker-style-name="T40"><text:span text:style-name="T40">xx</text:span><text:span text:style-name="T40"/></text:p>
          </table:table-cell>
          <table:table-cell table:style-name="Tabla1.A2" office:value-type="string">
            <text:p text:style-name="P63" loext:marker-style-name="T40"><text:span text:style-name="T40">xx</text:span><text:span text:style-name="T40"/></text:p>
          </table:table-cell>
          <table:table-cell table:style-name="Tabla1.A2" office:value-type="string">
            <text:p text:style-name="P63" loext:marker-style-name="T40"><text:span text:style-name="T40">xx</text:span><text:span text:style-name="T40"/></text:p>
          </table:table-cell>
          <table:table-cell table:style-name="Tabla1.A2" office:value-type="string">
            <text:p text:style-name="P63" loext:marker-style-name="T40"><text:span text:style-name="T40">xx</text:span><text:span text:style-name="T40"/></text:p>
          </table:table-cell>
        </table:table-row>
        <table:table-row table:style-name="Tabla1.1">
          <table:table-cell table:style-name="Tabla1.A6" office:value-type="string">
            <text:p text:style-name="P62" loext:marker-style-name="T40"><text:span text:style-name="T40">Variable 5</text:span><text:span text:style-name="T40"/></text:p>
          </table:table-cell>
          <table:table-cell table:style-name="Tabla1.A6" office:value-type="string">
            <text:p text:style-name="P63" loext:marker-style-name="T40"><text:span text:style-name="T40">xx</text:span><text:span text:style-name="T40"/></text:p>
          </table:table-cell>
          <table:table-cell table:style-name="Tabla1.A6" office:value-type="string">
            <text:p text:style-name="P63" loext:marker-style-name="T40"><text:span text:style-name="T40">xx</text:span><text:span text:style-name="T40"/></text:p>
          </table:table-cell>
          <table:table-cell table:style-name="Tabla1.A6" office:value-type="string">
            <text:p text:style-name="P63" loext:marker-style-name="T40"><text:span text:style-name="T40">xx</text:span><text:span text:style-name="T40"/></text:p>
          </table:table-cell>
          <table:table-cell table:style-name="Tabla1.A6" office:value-type="string">
            <text:p text:style-name="P63" loext:marker-style-name="T40"><text:span text:style-name="T40">xx</text:span><text:span text:style-name="T40"/></text:p>
          </table:table-cell>
          <table:table-cell table:style-name="Tabla1.A6" office:value-type="string">
            <text:p text:style-name="P63" loext:marker-style-name="T40"><text:span text:style-name="T40">xx</text:span><text:span text:style-name="T40"/></text:p>
          </table:table-cell>
        </table:table-row>
        <table:table-row table:style-name="Tabla1.1">
          <table:table-cell table:style-name="Tabla1.A1" office:value-type="string">
            <text:p text:style-name="P62" loext:marker-style-name="T40"><text:span text:style-name="T40">Total</text:span><text:span text:style-name="T40"/></text:p>
          </table:table-cell>
          <table:table-cell table:style-name="Tabla1.A1" office:value-type="string">
            <text:p text:style-name="P63" loext:marker-style-name="T40"><text:span text:style-name="T40">xx</text:span><text:span text:style-name="T40"/></text:p>
          </table:table-cell>
          <table:table-cell table:style-name="Tabla1.A1" office:value-type="string">
            <text:p text:style-name="P63" loext:marker-style-name="T40"><text:span text:style-name="T40">xx</text:span><text:span text:style-name="T40"/></text:p>
          </table:table-cell>
          <table:table-cell table:style-name="Tabla1.A1" office:value-type="string">
            <text:p text:style-name="P63" loext:marker-style-name="T40"><text:span text:style-name="T40">xx</text:span><text:span text:style-name="T40"/></text:p>
          </table:table-cell>
          <table:table-cell table:style-name="Tabla1.A1" office:value-type="string">
            <text:p text:style-name="P63" loext:marker-style-name="T40"><text:span text:style-name="T40">xx</text:span><text:span text:style-name="T40"/></text:p>
          </table:table-cell>
          <table:table-cell table:style-name="Tabla1.A1" office:value-type="string">
            <text:p text:style-name="P63" loext:marker-style-name="T40"><text:span text:style-name="T40">xx</text:span><text:span text:style-name="T40"/></text:p>
          </table:table-cell>
        </table:table-row>
      </table:table>
      <text:p text:style-name="Notas_20_APA">Nota: times new roman 10.</text:p>
      <text:p text:style-name="APA_20_Párrafo"/>
      <text:p text:style-name="APA_20_Párrafo">Si de originalidad se trata, las normas APA tienen un doctorado. Es por eso que se han mantenido vigentes con el pasar de los años y es un <text:span text:style-name="Strong_20_Emphasis"><text:span text:style-name="T37">criterio casi obligatorio</text:span></text:span> a la hora de redactar un informe, documento, artículo, etc. de carácter científico.</text:p>
      <text:p text:style-name="TITULO._20_Tablas_20_y_20_Figuras"><text:bookmark-start text:name="_Toc35446747"/><text:span text:style-name="T38">Tabla </text:span><text:span text:style-name="T38"><text:sequence text:ref-name="refTable1" text:name="Table" text:formula="ooow:Table+1" style:num-format="1">2</text:sequence></text:span><text:line-break/>asdasdsadsadad.<text:bookmark-end text:name="_Toc35446747"/></text:p>
      <table:table table:name="Tabla2" table:style-name="Tabla2">
        <table:table-column table:style-name="Tabla2.A" table:number-columns-repeated="4"/>
        <table:table-row table:style-name="Tabla2.1">
          <table:table-cell table:style-name="Tabla2.A1" office:value-type="string">
            <text:p text:style-name="P62" loext:marker-style-name="T39"><text:span text:style-name="T39">variables</text:span><text:span text:style-name="T39"/></text:p>
          </table:table-cell>
          <table:table-cell table:style-name="Tabla2.A1" office:value-type="string">
            <text:p text:style-name="P63" loext:marker-style-name="T39"><text:span text:style-name="T39">categoría </text:span><text:span text:style-name="T39"/></text:p>
          </table:table-cell>
          <table:table-cell table:style-name="Tabla2.A1" office:value-type="string">
            <text:p text:style-name="P63" loext:marker-style-name="T39"><text:span text:style-name="T39">categoría </text:span><text:span text:style-name="T39"/></text:p>
          </table:table-cell>
          <table:table-cell table:style-name="Tabla2.A1" office:value-type="string">
            <text:p text:style-name="P63" loext:marker-style-name="T39"><text:span text:style-name="T39">categoría </text:span><text:span text:style-name="T39"/></text:p>
          </table:table-cell>
        </table:table-row>
        <table:table-row table:style-name="Tabla2.1">
          <table:table-cell table:style-name="Tabla2.A2" office:value-type="string">
            <text:p text:style-name="P62" loext:marker-style-name="T40"><text:span text:style-name="T40">Variable 1</text:span><text:span text:style-name="T40"/></text:p>
          </table:table-cell>
          <table:table-cell table:style-name="Tabla2.A2" office:value-type="string">
            <text:p text:style-name="P63" loext:marker-style-name="T40"><text:span text:style-name="T40">xx</text:span><text:span text:style-name="T40"/></text:p>
          </table:table-cell>
          <table:table-cell table:style-name="Tabla2.A2" office:value-type="string">
            <text:p text:style-name="P63" loext:marker-style-name="T40"><text:span text:style-name="T40">xx</text:span><text:span text:style-name="T40"/></text:p>
          </table:table-cell>
          <table:table-cell table:style-name="Tabla2.A2" office:value-type="string">
            <text:p text:style-name="P63" loext:marker-style-name="T40"><text:span text:style-name="T40">xx</text:span><text:span text:style-name="T40"/></text:p>
          </table:table-cell>
        </table:table-row>
        <table:table-row table:style-name="Tabla2.1">
          <table:table-cell table:style-name="Tabla2.A2" office:value-type="string">
            <text:p text:style-name="P62" loext:marker-style-name="T40"><text:span text:style-name="T40">Variable 2</text:span><text:span text:style-name="T40"/></text:p>
          </table:table-cell>
          <table:table-cell table:style-name="Tabla2.A2" office:value-type="string">
            <text:p text:style-name="P63" loext:marker-style-name="T40"><text:span text:style-name="T40">xx</text:span><text:span text:style-name="T40"/></text:p>
          </table:table-cell>
          <table:table-cell table:style-name="Tabla2.A2" office:value-type="string">
            <text:p text:style-name="P63" loext:marker-style-name="T40"><text:span text:style-name="T40">xx</text:span><text:span text:style-name="T40"/></text:p>
          </table:table-cell>
          <table:table-cell table:style-name="Tabla2.A2" office:value-type="string">
            <text:p text:style-name="P63" loext:marker-style-name="T40"><text:span text:style-name="T40">xx</text:span><text:span text:style-name="T40"/></text:p>
          </table:table-cell>
        </table:table-row>
        <table:table-row table:style-name="Tabla2.1">
          <table:table-cell table:style-name="Tabla2.A2" office:value-type="string">
            <text:p text:style-name="P62" loext:marker-style-name="T40"><text:span text:style-name="T40">Variable 3</text:span><text:span text:style-name="T40"/></text:p>
          </table:table-cell>
          <table:table-cell table:style-name="Tabla2.A2" office:value-type="string">
            <text:p text:style-name="P63" loext:marker-style-name="T40"><text:span text:style-name="T40">xx</text:span><text:span text:style-name="T40"/></text:p>
          </table:table-cell>
          <table:table-cell table:style-name="Tabla2.A2" office:value-type="string">
            <text:p text:style-name="P63" loext:marker-style-name="T40"><text:span text:style-name="T40">xx</text:span><text:span text:style-name="T40"/></text:p>
          </table:table-cell>
          <table:table-cell table:style-name="Tabla2.A2" office:value-type="string">
            <text:p text:style-name="P63" loext:marker-style-name="T40"><text:span text:style-name="T40">xx</text:span><text:span text:style-name="T40"/></text:p>
          </table:table-cell>
        </table:table-row>
        <table:table-row table:style-name="Tabla2.1">
          <table:table-cell table:style-name="Tabla2.A2" office:value-type="string">
            <text:p text:style-name="P62" loext:marker-style-name="T40"><text:span text:style-name="T40">Variable 4</text:span><text:span text:style-name="T40"/></text:p>
          </table:table-cell>
          <table:table-cell table:style-name="Tabla2.A2" office:value-type="string">
            <text:p text:style-name="P63" loext:marker-style-name="T40"><text:span text:style-name="T40">xx</text:span><text:span text:style-name="T40"/></text:p>
          </table:table-cell>
          <table:table-cell table:style-name="Tabla2.A2" office:value-type="string">
            <text:p text:style-name="P63" loext:marker-style-name="T40"><text:span text:style-name="T40">xx</text:span><text:span text:style-name="T40"/></text:p>
          </table:table-cell>
          <table:table-cell table:style-name="Tabla2.A2" office:value-type="string">
            <text:p text:style-name="P63" loext:marker-style-name="T40"><text:span text:style-name="T40">xx</text:span><text:span text:style-name="T40"/></text:p>
          </table:table-cell>
        </table:table-row>
        <table:table-row table:style-name="Tabla2.1">
          <table:table-cell table:style-name="Tabla2.A2" office:value-type="string">
            <text:p text:style-name="P62" loext:marker-style-name="T40"><text:span text:style-name="T40">Variable 5</text:span><text:span text:style-name="T40"/></text:p>
          </table:table-cell>
          <table:table-cell table:style-name="Tabla2.A2" office:value-type="string">
            <text:p text:style-name="P63" loext:marker-style-name="T40"><text:span text:style-name="T40">xx</text:span><text:span text:style-name="T40"/></text:p>
          </table:table-cell>
          <table:table-cell table:style-name="Tabla2.A2" office:value-type="string">
            <text:p text:style-name="P63" loext:marker-style-name="T40"><text:span text:style-name="T40">xx</text:span><text:span text:style-name="T40"/></text:p>
          </table:table-cell>
          <table:table-cell table:style-name="Tabla2.A2" office:value-type="string">
            <text:p text:style-name="P63" loext:marker-style-name="T40"><text:span text:style-name="T40">xx</text:span><text:span text:style-name="T40"/></text:p>
          </table:table-cell>
        </table:table-row>
        <table:table-row table:style-name="Tabla2.1">
          <table:table-cell table:style-name="Tabla2.A7" office:value-type="string">
            <text:p text:style-name="P62" loext:marker-style-name="T40"><text:span text:style-name="T40">Total</text:span><text:span text:style-name="T40"/></text:p>
          </table:table-cell>
          <table:table-cell table:style-name="Tabla2.A7" office:value-type="string">
            <text:p text:style-name="P63" loext:marker-style-name="T40"><text:span text:style-name="T40">xx</text:span><text:span text:style-name="T40"/></text:p>
          </table:table-cell>
          <table:table-cell table:style-name="Tabla2.A7" office:value-type="string">
            <text:p text:style-name="P63" loext:marker-style-name="T40"><text:span text:style-name="T40">xx</text:span><text:span text:style-name="T40"/></text:p>
          </table:table-cell>
          <table:table-cell table:style-name="Tabla2.A7" office:value-type="string">
            <text:p text:style-name="P63" loext:marker-style-name="T40"><text:span text:style-name="T40">xx</text:span><text:span text:style-name="T40"/></text:p>
          </table:table-cell>
        </table:table-row>
      </table:table>
      <text:p text:style-name="Notas_20_APA">Nota: times new roman 10.</text:p>
      <text:p text:style-name="APA_20_Párrafo"/>
      <text:p text:style-name="TITULO._20_Tablas_20_y_20_Figuras"><text:bookmark-start text:name="_Toc35446748"/><text:soft-page-break/><text:span text:style-name="T38">Tabla </text:span><text:span text:style-name="T38"><text:sequence text:ref-name="refTable2" text:name="Table" text:formula="ooow:Table+1" style:num-format="1">3</text:sequence></text:span><text:line-break/>El título debe ser claro y descriptivo<text:bookmark-end text:name="_Toc35446748"/></text:p>
      <table:table table:name="Tabla3" table:style-name="Tabla3">
        <table:table-column table:style-name="Tabla3.A"/>
        <table:table-column table:style-name="Tabla3.B"/>
        <table:table-column table:style-name="Tabla3.C"/>
        <table:table-column table:style-name="Tabla3.A"/>
        <table:table-column table:style-name="Tabla3.B"/>
        <table:table-column table:style-name="Tabla3.C"/>
        <table:table-row table:style-name="Tabla3.1">
          <table:table-cell table:style-name="Tabla3.A1" office:value-type="string">
            <text:p text:style-name="P62" loext:marker-style-name="T39"><text:span text:style-name="T39">variables</text:span><text:span text:style-name="T39"/></text:p>
          </table:table-cell>
          <table:table-cell table:style-name="Tabla3.A1" office:value-type="string">
            <text:p text:style-name="P63" loext:marker-style-name="T39"><text:span text:style-name="T39">categoría </text:span><text:span text:style-name="T39"/></text:p>
          </table:table-cell>
          <table:table-cell table:style-name="Tabla3.A1" office:value-type="string">
            <text:p text:style-name="P63" loext:marker-style-name="T39"><text:span text:style-name="T39">categoría </text:span><text:span text:style-name="T39"/></text:p>
          </table:table-cell>
          <table:table-cell table:style-name="Tabla3.A1" office:value-type="string">
            <text:p text:style-name="P63" loext:marker-style-name="T39"><text:span text:style-name="T39">categoría </text:span><text:span text:style-name="T39"/></text:p>
          </table:table-cell>
          <table:table-cell table:style-name="Tabla3.A1" office:value-type="string">
            <text:p text:style-name="P63" loext:marker-style-name="T39"><text:span text:style-name="T39">categoría </text:span><text:span text:style-name="T39"/></text:p>
          </table:table-cell>
          <table:table-cell table:style-name="Tabla3.A1" office:value-type="string">
            <text:p text:style-name="P63" loext:marker-style-name="T39"><text:span text:style-name="T39">categoría </text:span><text:span text:style-name="T39"/></text:p>
          </table:table-cell>
        </table:table-row>
        <table:table-row table:style-name="Tabla3.1">
          <table:table-cell table:style-name="Tabla3.A2" office:value-type="string">
            <text:p text:style-name="P62" loext:marker-style-name="T40"><text:span text:style-name="T40">Variable 1</text:span><text:span text:style-name="T40"/></text:p>
          </table:table-cell>
          <table:table-cell table:style-name="Tabla3.A2" office:value-type="string">
            <text:p text:style-name="P63" loext:marker-style-name="T40"><text:span text:style-name="T40">xx</text:span><text:span text:style-name="T40"/></text:p>
          </table:table-cell>
          <table:table-cell table:style-name="Tabla3.A2" office:value-type="string">
            <text:p text:style-name="P63" loext:marker-style-name="T40"><text:span text:style-name="T40">xx</text:span><text:span text:style-name="T40"/></text:p>
          </table:table-cell>
          <table:table-cell table:style-name="Tabla3.A2" office:value-type="string">
            <text:p text:style-name="P63" loext:marker-style-name="T40"><text:span text:style-name="T40">xx</text:span><text:span text:style-name="T40"/></text:p>
          </table:table-cell>
          <table:table-cell table:style-name="Tabla3.A2" office:value-type="string">
            <text:p text:style-name="P63" loext:marker-style-name="T40"><text:span text:style-name="T40">xx</text:span><text:span text:style-name="T40"/></text:p>
          </table:table-cell>
          <table:table-cell table:style-name="Tabla3.A2" office:value-type="string">
            <text:p text:style-name="P63" loext:marker-style-name="T40"><text:span text:style-name="T40">xx</text:span><text:span text:style-name="T40"/></text:p>
          </table:table-cell>
        </table:table-row>
        <table:table-row table:style-name="Tabla3.1">
          <table:table-cell table:style-name="Tabla3.A2" office:value-type="string">
            <text:p text:style-name="P62" loext:marker-style-name="T40"><text:span text:style-name="T40">Variable 2</text:span><text:span text:style-name="T40"/></text:p>
          </table:table-cell>
          <table:table-cell table:style-name="Tabla3.A2" office:value-type="string">
            <text:p text:style-name="P63" loext:marker-style-name="T40"><text:span text:style-name="T40">xx</text:span><text:span text:style-name="T40"/></text:p>
          </table:table-cell>
          <table:table-cell table:style-name="Tabla3.A2" office:value-type="string">
            <text:p text:style-name="P63" loext:marker-style-name="T40"><text:span text:style-name="T40">xx</text:span><text:span text:style-name="T40"/></text:p>
          </table:table-cell>
          <table:table-cell table:style-name="Tabla3.A2" office:value-type="string">
            <text:p text:style-name="P63" loext:marker-style-name="T40"><text:span text:style-name="T40">xx</text:span><text:span text:style-name="T40"/></text:p>
          </table:table-cell>
          <table:table-cell table:style-name="Tabla3.A2" office:value-type="string">
            <text:p text:style-name="P63" loext:marker-style-name="T40"><text:span text:style-name="T40">xx</text:span><text:span text:style-name="T40"/></text:p>
          </table:table-cell>
          <table:table-cell table:style-name="Tabla3.A2" office:value-type="string">
            <text:p text:style-name="P63" loext:marker-style-name="T40"><text:span text:style-name="T40">xx</text:span><text:span text:style-name="T40"/></text:p>
          </table:table-cell>
        </table:table-row>
        <table:table-row table:style-name="Tabla3.1">
          <table:table-cell table:style-name="Tabla3.A2" office:value-type="string">
            <text:p text:style-name="P62" loext:marker-style-name="T40"><text:span text:style-name="T40">Variable 3</text:span><text:span text:style-name="T40"/></text:p>
          </table:table-cell>
          <table:table-cell table:style-name="Tabla3.A2" office:value-type="string">
            <text:p text:style-name="P63" loext:marker-style-name="T40"><text:span text:style-name="T40">xx</text:span><text:span text:style-name="T40"/></text:p>
          </table:table-cell>
          <table:table-cell table:style-name="Tabla3.A2" office:value-type="string">
            <text:p text:style-name="P63" loext:marker-style-name="T40"><text:span text:style-name="T40">xx</text:span><text:span text:style-name="T40"/></text:p>
          </table:table-cell>
          <table:table-cell table:style-name="Tabla3.A2" office:value-type="string">
            <text:p text:style-name="P63" loext:marker-style-name="T40"><text:span text:style-name="T40">xx</text:span><text:span text:style-name="T40"/></text:p>
          </table:table-cell>
          <table:table-cell table:style-name="Tabla3.A2" office:value-type="string">
            <text:p text:style-name="P63" loext:marker-style-name="T40"><text:span text:style-name="T40">xx</text:span><text:span text:style-name="T40"/></text:p>
          </table:table-cell>
          <table:table-cell table:style-name="Tabla3.A2" office:value-type="string">
            <text:p text:style-name="P63" loext:marker-style-name="T40"><text:span text:style-name="T40">xx</text:span><text:span text:style-name="T40"/></text:p>
          </table:table-cell>
        </table:table-row>
        <table:table-row table:style-name="Tabla3.1">
          <table:table-cell table:style-name="Tabla3.A2" office:value-type="string">
            <text:p text:style-name="P62" loext:marker-style-name="T40"><text:span text:style-name="T40">Variable 4</text:span><text:span text:style-name="T40"/></text:p>
          </table:table-cell>
          <table:table-cell table:style-name="Tabla3.A2" office:value-type="string">
            <text:p text:style-name="P63" loext:marker-style-name="T40"><text:span text:style-name="T40">xx</text:span><text:span text:style-name="T40"/></text:p>
          </table:table-cell>
          <table:table-cell table:style-name="Tabla3.A2" office:value-type="string">
            <text:p text:style-name="P63" loext:marker-style-name="T40"><text:span text:style-name="T40">xx</text:span><text:span text:style-name="T40"/></text:p>
          </table:table-cell>
          <table:table-cell table:style-name="Tabla3.A2" office:value-type="string">
            <text:p text:style-name="P63" loext:marker-style-name="T40"><text:span text:style-name="T40">xx</text:span><text:span text:style-name="T40"/></text:p>
          </table:table-cell>
          <table:table-cell table:style-name="Tabla3.A2" office:value-type="string">
            <text:p text:style-name="P63" loext:marker-style-name="T40"><text:span text:style-name="T40">xx</text:span><text:span text:style-name="T40"/></text:p>
          </table:table-cell>
          <table:table-cell table:style-name="Tabla3.A2" office:value-type="string">
            <text:p text:style-name="P63" loext:marker-style-name="T40"><text:span text:style-name="T40">xx</text:span><text:span text:style-name="T40"/></text:p>
          </table:table-cell>
        </table:table-row>
        <table:table-row table:style-name="Tabla3.1">
          <table:table-cell table:style-name="Tabla3.A6" office:value-type="string">
            <text:p text:style-name="P62" loext:marker-style-name="T40"><text:span text:style-name="T40">Variable 5</text:span><text:span text:style-name="T40"/></text:p>
          </table:table-cell>
          <table:table-cell table:style-name="Tabla3.A6" office:value-type="string">
            <text:p text:style-name="P63" loext:marker-style-name="T40"><text:span text:style-name="T40">xx</text:span><text:span text:style-name="T40"/></text:p>
          </table:table-cell>
          <table:table-cell table:style-name="Tabla3.A6" office:value-type="string">
            <text:p text:style-name="P63" loext:marker-style-name="T40"><text:span text:style-name="T40">xx</text:span><text:span text:style-name="T40"/></text:p>
          </table:table-cell>
          <table:table-cell table:style-name="Tabla3.A6" office:value-type="string">
            <text:p text:style-name="P63" loext:marker-style-name="T40"><text:span text:style-name="T40">xx</text:span><text:span text:style-name="T40"/></text:p>
          </table:table-cell>
          <table:table-cell table:style-name="Tabla3.A6" office:value-type="string">
            <text:p text:style-name="P63" loext:marker-style-name="T40"><text:span text:style-name="T40">xx</text:span><text:span text:style-name="T40"/></text:p>
          </table:table-cell>
          <table:table-cell table:style-name="Tabla3.A6" office:value-type="string">
            <text:p text:style-name="P63" loext:marker-style-name="T40"><text:span text:style-name="T40">xx</text:span><text:span text:style-name="T40"/></text:p>
          </table:table-cell>
        </table:table-row>
        <table:table-row table:style-name="Tabla3.1">
          <table:table-cell table:style-name="Tabla3.A1" office:value-type="string">
            <text:p text:style-name="P62" loext:marker-style-name="T40"><text:span text:style-name="T40">Total</text:span><text:span text:style-name="T40"/></text:p>
          </table:table-cell>
          <table:table-cell table:style-name="Tabla3.A1" office:value-type="string">
            <text:p text:style-name="P63" loext:marker-style-name="T40"><text:span text:style-name="T40">xx</text:span><text:span text:style-name="T40"/></text:p>
          </table:table-cell>
          <table:table-cell table:style-name="Tabla3.A1" office:value-type="string">
            <text:p text:style-name="P63" loext:marker-style-name="T40"><text:span text:style-name="T40">xx</text:span><text:span text:style-name="T40"/></text:p>
          </table:table-cell>
          <table:table-cell table:style-name="Tabla3.A1" office:value-type="string">
            <text:p text:style-name="P63" loext:marker-style-name="T40"><text:span text:style-name="T40">xx</text:span><text:span text:style-name="T40"/></text:p>
          </table:table-cell>
          <table:table-cell table:style-name="Tabla3.A1" office:value-type="string">
            <text:p text:style-name="P63" loext:marker-style-name="T40"><text:span text:style-name="T40">xx</text:span><text:span text:style-name="T40"/></text:p>
          </table:table-cell>
          <table:table-cell table:style-name="Tabla3.A1" office:value-type="string">
            <text:p text:style-name="P63" loext:marker-style-name="T40"><text:span text:style-name="T40">xx</text:span><text:span text:style-name="T40"/></text:p>
          </table:table-cell>
        </table:table-row>
      </table:table>
      <text:p text:style-name="Notas_20_APA">Nota: times new roman 10.</text:p>
      <text:p text:style-name="Notas_20_APA"/>
      <text:h text:style-name="P60" text:outline-level="2"><text:bookmark-start text:name="_Toc75262153"/><text:bookmark-start text:name="__RefHeading___Toc3749_3540835330"/>Figuras APA 7ma edición<text:bookmark-end text:name="_Toc75262153"/><text:bookmark-end text:name="__RefHeading___Toc3749_3540835330"/></text:h>
      <text:p text:style-name="TITULO._20_Tablas_20_y_20_Figuras"><text:bookmark-start text:name="_Toc35446644"/><text:span text:style-name="T38">Figura </text:span><text:span text:style-name="T38"><text:sequence text:ref-name="refFigure0" text:name="Figure" text:formula="ooow:Figure+1" style:num-format="1">1</text:sequence></text:span><text:line-break/>el titulo debe ser breve y conciso<text:bookmark-end text:name="_Toc35446644"/></text:p>
      <text:p text:style-name="P64"><draw:frame draw:style-name="fr5" draw:name="Imagen 3" text:anchor-type="as-char" svg:width="5.5in" svg:height="3.2957in" draw:z-index="0"><draw:image xlink:href="Pictures/1000000000000123000000ADAAEC27DD.png" xlink:type="simple" xlink:show="embed" xlink:actuate="onLoad" draw:mime-type="image/png"/><svg:desc>Resultado de imagen de espectros segun la norma e.030</svg:desc></draw:frame></text:p>
      <text:p text:style-name="Notas_20_APA">Nota: times new roman 10.</text:p>
      <text:p text:style-name="APA_20_Párrafo">Si de originalidad se trata, las normas APA tienen un doctorado. Es por eso que se han mantenido vigentes con el pasar de los años y es un <text:span text:style-name="Strong_20_Emphasis"><text:span text:style-name="T37">criterio casi obligatorio</text:span></text:span> a la hora de redactar un informe, documento, artículo, etc. de carácter científico.</text:p>
      <text:p text:style-name="TITULO._20_Tablas_20_y_20_Figuras"><text:bookmark-start text:name="_Toc35446645"/><text:soft-page-break/><text:span text:style-name="T38">Figura </text:span><text:span text:style-name="T38"><text:sequence text:ref-name="refFigure1" text:name="Figure" text:formula="ooow:Figure+1" style:num-format="1">2</text:sequence></text:span><text:line-break/>xxxxxxxxxxxxxxxxx<text:bookmark-end text:name="_Toc35446645"/></text:p>
      <text:p text:style-name="P64"><draw:frame draw:style-name="fr5" draw:name="Imagen2" text:anchor-type="as-char" svg:width="5.4339in" svg:height="3.2563in" draw:z-index="1"><draw:image xlink:href="Pictures/1000000000000123000000ADAAEC27DD.png" xlink:type="simple" xlink:show="embed" xlink:actuate="onLoad" draw:mime-type="image/png"/><svg:desc>Resultado de imagen de espectros segun la norma e.030</svg:desc></draw:frame></text:p>
      <text:p text:style-name="Notas_20_APA">Nota: times new roman 10.</text:p>
      <text:p text:style-name="Standard"/>
      <text:p text:style-name="P65"/>
      <text:h text:style-name="P61" text:outline-level="1"><text:bookmark-start text:name="_Toc75262154"/><text:bookmark-start text:name="__RefHeading___Toc3751_3540835330"/>Capítulo <text:span text:style-name="T36">X</text:span><text:line-break/>Citas y Referencias<text:bookmark-end text:name="_Toc75262154"/><text:bookmark-end text:name="__RefHeading___Toc3751_3540835330"/></text:h>
      <text:h text:style-name="Heading_20_2" text:outline-level="2"><text:bookmark-start text:name="__RefHeading___Toc7181_3540835330"/>Citas Directas<text:bookmark-end text:name="__RefHeading___Toc7181_3540835330"/></text:h>
      <text:p text:style-name="Standard">Cita corta</text:p>
      <text:list text:style-name="WWNum6">
        <text:list-item>
          <text:p text:style-name="P66" loext:marker-style-name="T11"><text:span text:style-name="T11">Parenética</text:span><text:span text:style-name="T11"/></text:p>
        </text:list-item>
      </text:list>
      <text:p text:style-name="Standard">La ira es considerada como una simple reacción humana, y el pecado de la ira depende del grado en que se manifieste: “Cuando el movimiento instintivo pasional de la ira se despierta, nos ciega, nos estupidiza y nos convierte en una especie de bestias obcecadas. Ese exceso es perjudicial, pero yo creo que un punto de cólera es necesario<text:span text:style-name="T41">” (Savater, 2005, p. 81).</text:span></text:p>
      <text:list text:style-name="WWNum5">
        <text:list-item>
          <text:p text:style-name="P67" loext:marker-style-name="T11"><text:span text:style-name="T11">Narrativa</text:span><text:span text:style-name="T11"/></text:p>
        </text:list-item>
      </text:list>
      <text:p text:style-name="Standard" loext:marker-style-name="T11">Para<text:span text:style-name="T11"> </text:span><text:span text:style-name="T42">Savater (2005)</text:span><text:span text:style-name="T41">,</text:span> como para muchos, la ira es una simple reacción humana, y el pecado de la ira depende del grado en que se manifieste: “Cuando el movimiento instintivo pasional de la ira se despierta, nos ciega, nos estupidiza y nos convierte en una especie de bestias obcecadas. Ese exceso es perjudicial, pero yo creo que un punto de cólera es necesario” <text:span text:style-name="T42">(p. 81).</text:span></text:p>
      <text:p text:style-name="Standard">Cita en bloque</text:p>
      <text:list text:continue-numbering="true" text:style-name="WWNum5">
        <text:list-item>
          <text:p text:style-name="P67" loext:marker-style-name="T11"><text:span text:style-name="T11">Parenténica</text:span><text:span text:style-name="T11"/></text:p>
        </text:list-item>
      </text:list>
      <text:p text:style-name="APA_20_Párrafo">En definitiva, el asentamiento de blancos, mestizos y algunos esclavos se debió a las políticas de agregación y segregación de tierra para la explotación de ganado y sembradíos: </text:p>
      <text:p text:style-name="P68">Jurídicamente estaba justificado el asalto de las tierras de los indios. Entre el año de 1750 y el de 1800, época en que las comunidades indígenas del oriente colombiano fueron objeto de una política de agregación-segregación de tierras, el monto de las ventas de unos 68 resguardos fue de 110 308 pesos aproximadamente. En 1778, <text:soft-page-break/>Moreno y Escandón informaba desde San Gil, que la venta de solo 18 pueblos había representado un ingreso al erario de 45 560 pesos. <text:span text:style-name="T43">(Tovar, 1986, p. 23)</text:span></text:p>
      <text:list xml:id="list185513230580258" text:continue-numbering="true" text:style-name="WWNum5">
        <text:list-item>
          <text:p text:style-name="P67" loext:marker-style-name="T11"><text:span text:style-name="T11">Narrativa</text:span><text:span text:style-name="T11"/></text:p>
        </text:list-item>
      </text:list>
      <text:p text:style-name="Standard">El asentamiento de blancos, mestizos y algunos esclavos está directamente relacionado con las políticas de agregación y segregación de tierra, que advierte <text:span text:style-name="T41">Tovar </text:span><text:span text:style-name="T41"><text:bibliography-mark text:identifier="CITATION Tov86 \n  \t  \l 10250 " text:bibliography-type="article" text:title="(1986)">(1986)</text:bibliography-mark></text:span>, para la explotación de ganado y sembradíos: </text:p>
      <text:p text:style-name="P68">Jurídicamente estaba justificado el asalto de las tierras de los indios. Entre el año de 1750 y el de 1800, época en que las comunidades indígenas del oriente colombiano fueron objeto de una política de agregación-segregación de tierras, el monto de las ventas de unos 68 resguardos fue de 110 308 pesos aproximadamente. En 1778, Moreno y Escandón informaba desde San Gil, que la venta de solo 18 pueblos había representado un ingreso al erario de 45 560 pesos.<text:span text:style-name="T41"><text:bibliography-mark text:identifier="CITATION Tov86 \p 23 \n  \y  \t  \l 10250 " text:bibliography-type="article" text:title=" (pág. 23)"> (pág. 23)</text:bibliography-mark></text:span>.</text:p>
      <text:h text:style-name="Heading_20_2" text:outline-level="2"><text:bookmark-start text:name="__RefHeading___Toc7183_3540835330"/>Citas Indirectas<text:bookmark-end text:name="__RefHeading___Toc7183_3540835330"/></text:h>
      <text:p text:style-name="Standard">Parenténica</text:p>
      <text:p text:style-name="Standard">Finalmente, la ruralidad se puede referir al desarrollo rural, en el cual se contemplan estrategias de atención a poblaciones marginadas, vulnerables, desarticuladas, etcétera <text:span text:style-name="T43">(Dirven , et ál., 2018).</text:span></text:p>
      <text:list text:continue-numbering="true" text:style-name="WWNum5">
        <text:list-item>
          <text:p text:style-name="P69">Narrativa</text:p>
        </text:list-item>
      </text:list>
      <text:p text:style-name="Standard">Finalmente, <text:span text:style-name="T41">Dirven et ál. </text:span><text:span text:style-name="T41"><text:bibliography-mark text:identifier="CITATION Các18 \n  \t  \l 10250 " text:bibliography-type="article" text:title="(2018)">(2018)</text:bibliography-mark></text:span><text:s/>definen la ruralidad a partir del desarrollo rural, en el cual se contemplan estrategias de atención a poblaciones marginadas, vulnerables, desarticuladas, etcétera.</text:p>
      <text:p text:style-name="Standard">Comunicaciones Personales</text:p>
      <text:list text:continue-numbering="true" text:style-name="WWNum5">
        <text:list-item>
          <text:p text:style-name="P67" loext:marker-style-name="T11"><text:span text:style-name="T11">Citación parenténica</text:span><text:span text:style-name="T11"/></text:p>
        </text:list-item>
      </text:list>
      <text:p text:style-name="Standard">(C. Robayo, comunicación personal, 3 de mayo de 2018</text:p>
      <text:list text:continue-numbering="true" text:style-name="WWNum5">
        <text:list-item>
          <text:p text:style-name="P67" loext:marker-style-name="T11"><text:span text:style-name="T11">Citación <text:s/>narrativa</text:span><text:span text:style-name="T11"/></text:p>
        </text:list-item>
      </text:list>
      <text:p text:style-name="Standard"><text:soft-page-break/>T. Reyes (comunicación personal, 5 de febrero de 201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ystem" style:font-pitch="variable"/>
    <style:font-face style:name="Calibri" svg:font-family="Calibri" style:font-family-generic="roman"/>
    <style:font-face style:name="Calibri Light" svg:font-family="'Calibri Light'" style:font-family-generic="roman"/>
    <style:font-face style:name="Calibri1" svg:font-family="Calibri" style:font-family-generic="system" style:font-pitch="variable"/>
    <style:font-face style:name="Courier New" svg:font-family="'Courier New'"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draw:marker draw:name="Arrowheads_20_1" draw:display-name="Arrowheads 1" svg:viewBox="0 0 1013 1130" svg:d="M1009 1050l-449-1008-22-30-29-12-34 12-21 26-449 1012-5 13v8l5 21 12 21 17 13 21 4h903l21-4 21-13 9-21 4-21v-8z"/>
    <draw:marker draw:name="Arrowheads_20_2" draw:display-name="Arrowheads 2" svg:viewBox="0 0 20 13" svg:d="M0 13l10-13 10 13z"/>
    <draw:marker draw:name="TriangleMarker" svg:viewBox="0 0 1321 3493" svg:d="M1321 3493h-1321l702-3493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200%" fo:text-align="start" style:justify-single-word="false" fo:orphans="2" fo:widows="2" style:writing-mode="lr-tb"/>
      <style:text-properties style:font-name="Times New Roman" fo:font-family="'Times New Roman'" style:font-family-generic="roman" fo:font-size="12pt" style:font-size-asian="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Times New Roman" fo:font-family="'Times New Roman'" style:font-family-generic="roman" fo:font-size="12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Noto Sans Devanagari" style:font-family-complex="'Noto Sans Devanagari'" style:font-family-generic-complex="swiss"/>
    </style:style>
    <style:style style:name="Caption" style:family="paragraph" style:parent-style-name="Standard" style:next-style-name="Standard" loext:linked-style-name="Caption_20_Char" style:class="extra">
      <style:paragraph-properties fo:margin-top="0in" fo:margin-bottom="0.139in" style:contextual-spacing="false" fo:line-height="100%"/>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class="chapter">
      <style:paragraph-properties fo:text-align="center" style:justify-single-word="false" fo:keep-together="always" fo:keep-with-next="always"/>
      <style:text-properties fo:font-weight="bold" style:font-name-asian="Calibri1" style:font-family-asian="Calibri" style:font-family-generic-asian="system" style:font-pitch-asian="variable" style:font-weight-asian="bold" style:font-name-complex="Noto Sans Arabic" style:font-family-complex="'Noto Sans Arabic'"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class="chapter">
      <style:paragraph-properties fo:margin-left="0.4925in" fo:keep-together="always" fo:text-indent="-0.4925in" style:auto-text-indent="false" fo:keep-with-next="always"/>
      <style:text-properties fo:font-weight="bold" style:font-name-asian="Calibri1" style:font-family-asian="Calibri" style:font-family-generic-asian="system" style:font-pitch-asian="variable" style:font-weight-asian="bold" style:font-name-complex="Noto Sans Arabic" style:font-family-complex="'Noto Sans Arabic'"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class="chapter">
      <style:paragraph-properties fo:keep-together="always" fo:keep-with-next="always"/>
      <style:text-properties fo:font-style="italic" fo:font-weight="bold" style:font-name-asian="Calibri1" style:font-family-asian="Calibri" style:font-family-generic-asian="system" style:font-pitch-asian="variable" style:font-style-asian="italic" style:font-weight-asian="bold" style:font-name-complex="Noto Sans Arabic" style:font-family-complex="'Noto Sans Arabic'" style:font-family-generic-complex="system" style:font-pitch-complex="variable" style:font-size-complex="12pt"/>
    </style:style>
    <style:style style:name="Heading_20_4" style:display-name="Heading 4" style:family="paragraph" style:parent-style-name="Standard" style:next-style-name="Standard" loext:linked-style-name="Heading_20_4_20_Char" style:default-outline-level="4" style:class="chapter">
      <style:paragraph-properties fo:keep-together="always" fo:keep-with-next="always"/>
      <style:text-properties fo:font-weight="bold" style:font-name-asian="Calibri1" style:font-family-asian="Calibri" style:font-family-generic-asian="system" style:font-pitch-asian="variable" style:font-weight-asian="bold" style:font-name-complex="Noto Sans Arabic" style:font-family-complex="'Noto Sans Arabic'"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class="chapter">
      <style:paragraph-properties fo:keep-together="always" fo:keep-with-next="always"/>
      <style:text-properties fo:font-style="italic" fo:font-weight="bold" style:font-name-asian="Calibri1" style:font-family-asian="Calibri" style:font-family-generic-asian="system" style:font-pitch-asian="variable" style:font-style-asian="italic" style:font-weight-asian="bold" style:font-name-complex="Noto Sans Arabic" style:font-family-complex="'Noto Sans Arabic'"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class="chapter">
      <style:paragraph-properties fo:margin-top="0.028in" fo:margin-bottom="0in" style:contextual-spacing="false" fo:keep-together="always" fo:keep-with-next="always"/>
      <style:text-properties fo:color="#1f3763" loext:opacity="100%" style:font-name="Calibri Light" fo:font-family="'Calibri Light'" style:font-family-generic="roman" style:font-name-asian="Calibri1" style:font-family-asian="Calibri"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class="chapter">
      <style:paragraph-properties fo:margin-top="0.028in" fo:margin-bottom="0in" style:contextual-spacing="false" fo:keep-together="always" fo:keep-with-next="always"/>
      <style:text-properties fo:color="#1f3763" loext:opacity="100%" style:font-name="Calibri Light" fo:font-family="'Calibri Light'" style:font-family-generic="roman" fo:font-style="italic" style:font-name-asian="Calibri1"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 style:display-name="Heading 8" style:family="paragraph" style:parent-style-name="Standard" style:next-style-name="Standard" loext:linked-style-name="Heading_20_8_20_Char" style:default-outline-level="8" style:class="chapter">
      <style:paragraph-properties fo:margin-top="0.028in" fo:margin-bottom="0in" style:contextual-spacing="false" fo:keep-together="always" fo:keep-with-next="always"/>
      <style:text-properties fo:color="#272727" loext:opacity="100%" style:font-name="Calibri Light" fo:font-family="'Calibri Light'" style:font-family-generic="roman" fo:font-size="10.5pt" style:font-name-asian="Calibri1" style:font-family-asian="Calibri" style:font-family-generic-asian="system" style:font-pitch-asian="variable" style:font-size-asian="10.5pt" style:font-name-complex="Noto Sans Arabic" style:font-family-complex="'Noto Sans Arabic'"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class="chapter">
      <style:paragraph-properties fo:margin-top="0.028in" fo:margin-bottom="0in" style:contextual-spacing="false" fo:keep-together="always" fo:keep-with-next="always"/>
      <style:text-properties fo:color="#272727" loext:opacity="100%" style:font-name="Calibri Light" fo:font-family="'Calibri Light'" style:font-family-generic="roman" fo:font-size="10.5pt" fo:font-style="italic" style:font-name-asian="Calibri1" style:font-family-asian="Calibri" style:font-family-generic-asian="system" style:font-pitch-asian="variable" style:font-size-asian="10.5pt" style:font-style-asian="italic" style:font-name-complex="Noto Sans Arabic" style:font-family-complex="'Noto Sans Arabic'"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APA_20_Párrafo" style:display-name="APA Párrafo" style:family="paragraph" style:parent-style-name="Standard" loext:linked-style-name="APA_20_Párrafo_20_Car">
      <style:paragraph-properties fo:text-indent="0.5in" style:auto-text-indent="false"/>
      <style:text-properties fo:background-color="#ffffff" style:font-name-asian="Calibri1" style:font-family-asian="Calibri" style:font-family-generic-asian="system" style:font-pitch-asian="variable" style:font-name-complex="Arial" style:font-family-complex="Arial" style:font-family-generic-complex="system" style:font-pitch-complex="variable"/>
    </style:style>
    <style:style style:name="TITULO._20_Tablas_20_y_20_Figuras" style:display-name="TITULO. Tablas y Figuras" style:family="paragraph" style:parent-style-name="Caption" loext:linked-style-name="TITULO._20_Tablas_20_y_20_Figuras_20_Car">
      <style:paragraph-properties fo:margin-left="0.5in" fo:margin-top="0in" fo:margin-bottom="0in" style:contextual-spacing="false" fo:line-height="200%" fo:keep-with-next="always"/>
      <style:text-properties style:use-window-font-color="true" loext:opacity="0%" fo:font-size="12pt" style:font-size-asian="12pt">
        <loext:char-complex-color loext:theme-type="dark2" loext:color-type="theme"/>
      </style:text-properties>
    </style:style>
    <style:style style:name="Notas_20_APA" style:display-name="Notas APA" style:family="paragraph" style:parent-style-name="Standard" loext:linked-style-name="Notas_20_APA_20_Car">
      <style:paragraph-properties fo:margin-left="0.5in"/>
      <style:text-properties fo:font-size="10pt" style:font-size-asian="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line-height="100%">
        <style:tab-stops>
          <style:tab-stop style:position="2.9528in" style:type="center"/>
          <style:tab-stop style:position="5.9055in" style:type="right"/>
        </style:tab-stops>
      </style:paragraph-properties>
    </style:style>
    <style:style style:name="Footer" style:family="paragraph" style:parent-style-name="Standard" loext:linked-style-name="Footer_20_Char" style:class="extra">
      <style:paragraph-properties fo:line-height="100%">
        <style:tab-stops>
          <style:tab-stop style:position="2.9528in" style:type="center"/>
          <style:tab-stop style:position="5.9055in" style:type="right"/>
        </style:tab-stops>
      </style:paragraph-properties>
    </style:style>
    <style:style style:name="Figure_20_Index_20_1" style:display-name="Figure Index 1" style:family="paragraph" style:parent-style-name="Standard" style:next-style-name="Standard" style:class="index"/>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1665in" fo:margin-bottom="0in" style:contextual-spacing="false" fo:line-height="108%" fo:text-align="start" style:justify-single-word="false"/>
      <style:text-properties fo:color="#2f5496" loext:opacity="100%" style:font-name="Calibri Light" fo:font-family="'Calibri Light'" style:font-family-generic="roman" fo:font-size="16pt" fo:font-weight="normal" style:font-size-asian="16pt" style:language-asian="es" style:country-asian="PE" style:font-weight-asian="normal">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tab-stops>
          <style:tab-stop style:position="0.3335in"/>
          <style:tab-stop style:position="5.7618in" style:type="right" style:leader-style="dotted" style:leader-text="."/>
        </style:tab-stops>
      </style:paragraph-properties>
    </style:style>
    <style:style style:name="Contents_20_2" style:display-name="Contents 2" style:family="paragraph" style:parent-style-name="Standard" style:next-style-name="Standard" style:auto-update="true" style:class="index">
      <style:paragraph-properties fo:margin-left="0.1665in" fo:margin-top="0in" fo:margin-bottom="0.0693in" style:contextual-spacing="false"/>
    </style:style>
    <style:style style:name="Contents_20_3" style:display-name="Contents 3" style:family="paragraph" style:parent-style-name="Standard" style:next-style-name="Standard" style:auto-update="true" style:class="index">
      <style:paragraph-properties fo:margin-left="0.3335in" fo:margin-top="0in" fo:margin-bottom="0.0693in" style:contextual-spacing="false"/>
    </style:style>
    <style:style style:name="List_20_Paragraph" style:display-name="List Paragraph" style:family="paragraph" style:parent-style-name="Standard">
      <style:paragraph-properties fo:margin-left="0.5in" fo:margin-top="0in" fo:margin-bottom="0in" style:contextual-spacing="true"/>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APA_20_Párrafo_20_Car" style:display-name="APA Párrafo Car" style:family="text" style:parent-style-name="Default_20_Paragraph_20_Font" loext:linked-style-name="APA_20_Párrafo">
      <style:text-properties style:font-name="Times New Roman" fo:font-family="'Times New Roman'" style:font-family-generic="roman" fo:font-size="12pt" style:font-name-asian="Calibri1" style:font-family-asian="Calibri" style:font-family-generic-asian="system" style:font-pitch-asian="variable" style:font-size-asian="12pt" style:font-name-complex="Arial" style:font-family-complex="Arial" style:font-family-generic-complex="system" style:font-pitch-complex="variable"/>
    </style:style>
    <style:style style:name="Strong_20_Emphasis" style:display-name="Strong Emphasis"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style:font-name="Times New Roman" fo:font-family="'Times New Roman'" style:font-family-generic="roman" fo:font-size="12pt" fo:font-weight="bold" style:font-name-asian="Calibri1" style:font-family-asian="Calibri" style:font-family-generic-asian="system" style:font-pitch-asian="variable" style:font-size-asian="12pt" style:font-weight-asian="bold" style:font-name-complex="Noto Sans Arabic" style:font-family-complex="'Noto Sans Arabic'"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fo:font-size="12pt" fo:font-weight="bold" style:font-name-asian="Calibri1" style:font-family-asian="Calibri" style:font-family-generic-asian="system" style:font-pitch-asian="variable" style:font-size-asian="12pt" style:font-weight-asian="bold" style:font-name-complex="Noto Sans Arabic" style:font-family-complex="'Noto Sans Arabic'" style:font-family-generic-complex="system" style:font-pitch-complex="variable" style:font-size-complex="13pt"/>
    </style:style>
    <style:style style:name="Heading_20_3_20_Char" style:display-name="Heading 3 Char" style:family="text" style:parent-style-name="Default_20_Paragraph_20_Font">
      <style:text-properties style:font-name="Times New Roman" fo:font-family="'Times New Roman'" style:font-family-generic="roman" fo:font-size="12pt" fo:font-style="italic" fo:font-weight="bold" style:font-name-asian="Calibri1" style:font-family-asian="Calibri" style:font-family-generic-asian="system" style:font-pitch-asian="variable" style:font-size-asian="12pt" style:font-style-asian="italic" style:font-weight-asian="bold" style:font-name-complex="Noto Sans Arabic" style:font-family-complex="'Noto Sans Arabic'" style:font-family-generic-complex="system" style:font-pitch-complex="variable" style:font-size-complex="12pt"/>
    </style:style>
    <style:style style:name="Heading_20_4_20_Char" style:display-name="Heading 4 Char" style:family="text" style:parent-style-name="Default_20_Paragraph_20_Font">
      <style:text-properties style:font-name="Times New Roman" fo:font-family="'Times New Roman'" style:font-family-generic="roman" fo:font-size="12pt" fo:font-weight="bold" style:font-name-asian="Calibri1" style:font-family-asian="Calibri" style:font-family-generic-asian="system" style:font-pitch-asian="variable" style:font-size-asian="12pt" style:font-weight-asian="bold" style:font-name-complex="Noto Sans Arabic" style:font-family-complex="'Noto Sans Arabic'" style:font-family-generic-complex="system" style:font-pitch-complex="variable" style:font-style-complex="italic"/>
    </style:style>
    <style:style style:name="Heading_20_5_20_Char" style:display-name="Heading 5 Char" style:family="text" style:parent-style-name="Default_20_Paragraph_20_Font">
      <style:text-properties style:font-name="Times New Roman" fo:font-family="'Times New Roman'" style:font-family-generic="roman" fo:font-size="12pt" fo:font-style="italic" fo:font-weight="bold" style:font-name-asian="Calibri1" style:font-family-asian="Calibri" style:font-family-generic-asian="system" style:font-pitch-asian="variable" style:font-size-asian="12pt" style:font-style-asian="italic" style:font-weight-asian="bold" style:font-name-complex="Noto Sans Arabic" style:font-family-complex="'Noto Sans Arabic'" style:font-family-generic-complex="system" style:font-pitch-complex="variable"/>
    </style:style>
    <style:style style:name="Heading_20_6_20_Char" style:display-name="Heading 6 Char" style:family="text" style:parent-style-name="Default_20_Paragraph_20_Font">
      <style:text-properties fo:color="#1f3763" loext:opacity="100%" style:font-name="Calibri Light" fo:font-family="'Calibri Light'" style:font-family-generic="roman" fo:font-size="12pt" style:font-name-asian="Calibri1" style:font-family-asian="Calibri" style:font-family-generic-asian="system" style:font-pitch-asian="variable" style:font-size-asian="12pt" style:font-name-complex="Noto Sans Arabic" style:font-family-complex="'Noto Sans Arabic'" style:font-family-generic-complex="system" style:font-pitch-complex="variable">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style:text-properties fo:color="#1f3763" loext:opacity="100%" style:font-name="Calibri Light" fo:font-family="'Calibri Light'" style:font-family-generic="roman" fo:font-size="12pt" fo:font-style="italic" style:font-name-asian="Calibri1" style:font-family-asian="Calibri" style:font-family-generic-asian="system" style:font-pitch-asian="variable" style:font-size-asian="12pt"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_20_Char" style:display-name="Heading 8 Char" style:family="text" style:parent-style-name="Default_20_Paragraph_20_Font">
      <style:text-properties fo:color="#272727" loext:opacity="100%" style:font-name="Calibri Light" fo:font-family="'Calibri Light'" style:font-family-generic="roman" fo:font-size="10.5pt" style:font-name-asian="Calibri1" style:font-family-asian="Calibri" style:font-family-generic-asian="system" style:font-pitch-asian="variable" style:font-size-asian="10.5pt" style:font-name-complex="Noto Sans Arabic" style:font-family-complex="'Noto Sans Arabic'"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style:text-properties fo:color="#272727" loext:opacity="100%" style:font-name="Calibri Light" fo:font-family="'Calibri Light'" style:font-family-generic="roman" fo:font-size="10.5pt" fo:font-style="italic" style:font-name-asian="Calibri1" style:font-family-asian="Calibri" style:font-family-generic-asian="system" style:font-pitch-asian="variable" style:font-size-asian="10.5pt" style:font-style-asian="italic" style:font-name-complex="Noto Sans Arabic" style:font-family-complex="'Noto Sans Arabic'"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Caption_20_Char" style:display-name="Caption Char" style:family="text" style:parent-style-name="Default_20_Paragraph_20_Font">
      <style:text-properties fo:color="#44546a" loext:opacity="100%" style:font-name="Times New Roman" fo:font-family="'Times New Roman'" style:font-family-generic="roman" fo:font-size="9pt" fo:font-style="italic" style:font-size-asian="9pt" style:font-style-asian="italic" style:font-size-complex="9pt" style:font-style-complex="italic">
        <loext:char-complex-color loext:theme-type="dark2" loext:color-type="theme"/>
      </style:text-properties>
    </style:style>
    <style:style style:name="TITULO._20_Tablas_20_y_20_Figuras_20_Car" style:display-name="TITULO. Tablas y Figuras Car" style:family="text" style:parent-style-name="Caption_20_Char" loext:linked-style-name="TITULO._20_Tablas_20_y_20_Figuras">
      <style:text-properties fo:color="#44546a" loext:opacity="100%" style:font-name="Times New Roman" fo:font-family="'Times New Roman'" style:font-family-generic="roman" fo:font-size="12pt" fo:font-style="italic" style:font-size-asian="12pt" style:font-style-asian="italic" style:font-size-complex="9pt" style:font-style-complex="italic">
        <loext:char-complex-color loext:theme-type="dark2" loext:color-type="theme"/>
      </style:text-properties>
    </style:style>
    <style:style style:name="Notas_20_APA_20_Car" style:display-name="Notas APA Car" style:family="text" style:parent-style-name="Default_20_Paragraph_20_Font" loext:linked-style-name="Notas_20_APA">
      <style:text-properties style:font-name="Times New Roman" fo:font-family="'Times New Roman'" style:font-family-generic="roman" fo:font-size="10pt" style:font-size-asian="10pt"/>
    </style:style>
    <style:style style:name="Header_20_Char" style:display-name="Header Char" style:family="text" style:parent-style-name="Default_20_Paragraph_20_Font">
      <style:text-properties style:font-name="Times New Roman" fo:font-family="'Times New Roman'" style:font-family-generic="roman"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fo:font-size="12pt" style:font-size-asian="12pt"/>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color="#ffffff" loext:opacity="100%">
        <loext:char-complex-color loext:theme-type="light1" loext:color-type="theme"/>
      </style:text-properties>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fo:color="#ffffff" loext:opacity="100%">
        <loext:char-complex-color loext:theme-type="light1" loext:color-type="theme"/>
      </style:text-properties>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color="#ffffff" loext:opacity="100%">
        <loext:char-complex-color loext:theme-type="light1" loext:color-type="theme"/>
      </style:text-properties>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Index_20_Link" style:display-name="Index Link" style:family="text"/>
    <style:style style:name="T217" style:family="text"/>
    <style:style style:name="T218" style:family="text"/>
    <style:style style:name="T219" style:family="text"/>
    <style:style style:name="T220" style:family="text"/>
    <style:style style:name="T221" style:family="text"/>
    <style:style style:name="T222" style:family="text"/>
    <style:style style:name="T223" style:family="text"/>
    <style:style style:name="T224" style:family="text"/>
    <style:style style:name="T225"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28" loext:num-list-format="%1%." style:num-suffix="."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9" loext:num-list-format="%1%.%2%." style:num-suffix="."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0" loext:num-list-format="%1%.%2%.%3%." style:num-suffix="."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31" loext:num-list-format="%1%.%2%.%3%.%4%." style:num-suffix="." style:num-format="1" text:display-levels="4">
        <style:list-level-properties text:list-level-position-and-space-mode="label-alignment">
          <style:list-level-label-alignment text:label-followed-by="listtab" fo:text-indent="-0.6028in" fo:margin-left="1.1028in"/>
        </style:list-level-properties>
      </text:outline-level-style>
      <text:outline-level-style text:level="5" text:style-name="ListLabel_20_32" loext:num-list-format="%1%.%2%.%3%.%4%.%5%." style:num-suffix="." style:num-format="1" text:display-levels="5">
        <style:list-level-properties text:list-level-position-and-space-mode="label-alignment">
          <style:list-level-label-alignment text:label-followed-by="listtab" fo:text-indent="-0.7209in" fo:margin-left="1.2209in"/>
        </style:list-level-properties>
      </text:outline-level-style>
      <text:outline-level-style text:level="6" text:style-name="ListLabel_20_33"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34"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35"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36"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1.1" style:num-suffix=".1.1" style:num-format="1">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1.1" style:num-suffix=".1.1" style:num-format="1">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0.6028in" fo:margin-left="1.1028in"/>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0.7209in" fo:margin-left="1.2209in"/>
        </style:list-level-properties>
      </text:list-level-style-number>
      <text:list-level-style-number text:level="6" text:style-name="ListLabel_20_60"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61"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62"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63"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0.6028in" fo:margin-left="1.1028in"/>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0.7209in" fo:margin-left="1.2209in"/>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T21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T218" loext:num-list-format="%2%"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T219" loext:num-list-format="%3%" text:bullet-char="▪">
        <style:list-level-properties text:list-level-position-and-space-mode="label-alignment">
          <style:list-level-label-alignment text:label-followed-by="listtab" fo:text-indent="-0.25in" fo:margin-left="1in"/>
        </style:list-level-properties>
      </text:list-level-style-bullet>
      <text:list-level-style-bullet text:level="4" text:style-name="T220" loext:num-list-format="%4%"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T221" loext:num-list-format="%5%" text:bullet-char="◦">
        <style:list-level-properties text:list-level-position-and-space-mode="label-alignment">
          <style:list-level-label-alignment text:label-followed-by="listtab" fo:text-indent="-0.25in" fo:margin-left="1.5in"/>
        </style:list-level-properties>
      </text:list-level-style-bullet>
      <text:list-level-style-bullet text:level="6" text:style-name="T222" loext:num-list-format="%6%"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T223" loext:num-list-format="%7%" text:bullet-char="•">
        <style:list-level-properties text:list-level-position-and-space-mode="label-alignment">
          <style:list-level-label-alignment text:label-followed-by="listtab" fo:text-indent="-0.25in" fo:margin-left="2in"/>
        </style:list-level-properties>
      </text:list-level-style-bullet>
      <text:list-level-style-bullet text:level="8" text:style-name="T224" loext:num-list-format="%8%"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T225" loext:num-list-format="%9%"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number:number-style style:name="N10000" number:language="es" number:country="PE">
      <number:number number:min-integer-digits="1"/>
    </number:number-style>
    <number:text-style style:name="N10100" number:language="es" number:country="PE">
      <number:text-content/>
    </number:text-style>
    <style:style style:name="Academic.1" style:family="table-cell" style:data-style-name="N10100">
      <style:table-cell-properties fo:border-top="0.74pt solid #000000" fo:border-bottom="0.74pt solid #000000" fo:padding="0in" fo:padding-left="0in" fo:padding-right="0in" fo:padding-top="0in" fo:padding-bottom="0in"/>
      <style:text-properties/>
    </style:style>
    <style:style style:name="Academic.2" style:family="table-cell" style:data-style-name="N10000">
      <style:table-cell-properties fo:border-bottom="0.74pt solid #000000" fo:padding="0in" fo:padding-left="0in" fo:padding-right="0in" fo:padding-top="0in" fo:padding-bottom="0in"/>
      <style:text-properties/>
    </style:style>
    <style:style style:name="Academic.3" style:family="table-cell" style:data-style-name="N10100">
      <style:table-cell-properties fo:padding="0in" fo:padding-left="0in" fo:padding-right="0in" fo:padding-top="0in" fo:padding-bottom="0in"/>
      <style:text-properties/>
    </style:style>
    <style:style style:name="Academic.4" style:family="table-cell" style:data-style-name="N10000">
      <style:table-cell-properties fo:padding="0in" fo:padding-left="0in" fo:padding-right="0in" fo:padding-top="0in" fo:padding-bottom="0in"/>
      <style:text-properties/>
    </style:style>
    <style:style style:name="Academic.5" style:family="table-cell" style:data-style-name="N10000">
      <style:table-cell-properties fo:padding="0in" fo:padding-left="0in" fo:padding-right="0in" fo:padding-top="0in" fo:padding-bottom="0in"/>
      <style:text-properties/>
    </style:style>
    <style:style style:name="Academic.6" style:family="table-cell" style:data-style-name="N10100">
      <style:table-cell-properties fo:padding="0in" fo:padding-left="0in" fo:padding-right="0in" fo:padding-top="0in" fo:padding-bottom="0in"/>
      <style:text-properties/>
    </style:style>
    <style:style style:name="Academic.7" style:family="table-cell" style:data-style-name="N10000">
      <style:table-cell-properties fo:padding="0in" fo:padding-left="0in" fo:padding-right="0in" fo:padding-top="0in" fo:padding-bottom="0in"/>
      <style:text-properties/>
    </style:style>
    <style:style style:name="Academic.8" style:family="table-cell" style:data-style-name="N10000">
      <style:table-cell-properties fo:padding="0in" fo:padding-left="0in" fo:padding-right="0in" fo:padding-top="0in" fo:padding-bottom="0in"/>
      <style:text-properties/>
    </style:style>
    <style:style style:name="Academic.9" style:family="table-cell" style:data-style-name="N10000">
      <style:table-cell-properties fo:padding="0in" fo:padding-left="0in" fo:padding-right="0in" fo:padding-top="0in" fo:padding-bottom="0in"/>
      <style:text-properties/>
    </style:style>
    <style:style style:name="Academic.10" style:family="table-cell" style:data-style-name="N10000">
      <style:table-cell-properties fo:padding="0in" fo:padding-left="0in" fo:padding-right="0in" fo:padding-top="0in" fo:padding-bottom="0in"/>
      <style:text-propertie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style>
    <style:style style:name="Academic.13" style:family="table-cell" style:data-style-name="N10100">
      <style:table-cell-properties fo:border-bottom="0.74pt solid #000000" fo:padding="0in" fo:padding-left="0in" fo:padding-right="0in" fo:padding-top="0in" fo:padding-bottom="0in"/>
      <style:text-properties/>
    </style:style>
    <style:style style:name="Academic.14" style:family="table-cell" style:data-style-name="N10000">
      <style:table-cell-properties fo:border-bottom="0.74pt solid #000000" fo:padding="0in" fo:padding-left="0in" fo:padding-right="0in" fo:padding-top="0in" fo:padding-bottom="0in"/>
      <style:text-propertie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style>
    <style:style style:name="Academic.16" style:family="table-cell" style:data-style-name="N10000">
      <style:table-cell-properties fo:border-bottom="0.74pt solid #000000" fo:padding="0in" fo:padding-left="0in" fo:padding-right="0in" fo:padding-top="0in" fo:padding-bottom="0in"/>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4925in" fo:margin-bottom="1in" fo:margin-left="1.5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75in" fo:margin-left="0in" fo:margin-right="0in" fo:margin-bottom="0.4681in" style:dynamic-spacing="true"/>
      </style:header-style>
      <style:footer-style/>
    </style:page-layout>
    <style:page-layout style:name="Mpm2">
      <style:page-layout-properties fo:page-width="8.2681in" fo:page-height="11.6929in" style:num-format="I" style:print-orientation="portrait" fo:margin-top="0.4925in" fo:margin-bottom="1in" fo:margin-left="1.181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75in" fo:margin-left="0in" fo:margin-right="0in" fo:margin-bottom="0.4681in" style:dynamic-spacing="true"/>
      </style:header-style>
      <style:footer-style/>
    </style:page-layout>
    <style:page-layout style:name="Mpm3">
      <style:page-layout-properties fo:page-width="8.2681in" fo:page-height="11.6929in" style:num-format="1" style:print-orientation="portrait" fo:margin-top="0.4925in" fo:margin-bottom="1in" fo:margin-left="1.181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75in" fo:margin-left="0in" fo:margin-right="0in" fo:margin-bottom="0.4681in" style:dynamic-spacing="true"/>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10">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2681in" fo:page-height="11.6929in" style:num-format="1" style:print-orientation="portrait" fo:margin-top="1in" fo:margin-bottom="1in" fo:margin-left="1.181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Header"/>
      </style:header>
    </style:master-page>
    <style:master-page style:name="Converted1" style:page-layout-name="Mpm2" draw:style-name="Mdp1">
      <style:header>
        <text:p text:style-name="MP1"><text:page-number text:select-page="current">VII</text:page-number></text:p>
        <text:p text:style-name="MP1"/>
      </style:header>
    </style:master-page>
    <style:master-page style:name="Converted2" style:page-layout-name="Mpm3" draw:style-name="Mdp1">
      <style:header>
        <text:p text:style-name="MP1"><text:page-number text:select-page="current">9</text:page-number></text:p>
        <text:p text:style-name="MP1"/>
      </style:header>
    </style:master-page>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MasterPage2"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Usuario de Windows</meta:initial-creator>
    <dc:creator>Edison Achalma</dc:creator>
    <meta:editing-cycles>193</meta:editing-cycles>
    <meta:creation-date>2020-03-18T22:00:00</meta:creation-date>
    <dc:date>2026-01-19T18:55:11.539331399</dc:date>
    <meta:editing-duration>PT10H1M45S</meta:editing-duration>
    <meta:generator>LibreOffice/25.8.4.2$Linux_X86_64 LibreOffice_project/580$Build-2</meta:generator>
    <meta:document-statistic meta:table-count="4" meta:image-count="8" meta:object-count="0" meta:page-count="27" meta:paragraph-count="364" meta:word-count="3596" meta:character-count="20614" meta:non-whitespace-character-count="17435"/>
    <meta:user-defined meta:name="AppVersion">16.0000</meta:user-defined>
    <meta:user-defined meta:name="Mendeley Document_1">True</meta:user-defined>
    <meta:user-defined meta:name="Mendeley Unique User Id_1">200fea76-7854-30c9-adcc-19ad3e994ed7</meta:user-defined>
    <meta:template xlink:type="simple" xlink:actuate="onRequest" xlink:title="Normal.dotm" xlink:href=""/>
  </office:meta>
</office:document-meta>
</file>